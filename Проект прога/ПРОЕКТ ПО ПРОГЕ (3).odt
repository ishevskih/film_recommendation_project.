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44000004F4CA8DA7E9.png" manifest:media-type="image/png"/>
  <manifest:file-entry manifest:full-path="Pictures/1000000100000944000004F1C4F99C39.png" manifest:media-type="image/png"/>
  <manifest:file-entry manifest:full-path="Pictures/1000000100000951000004EE982E3E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551cm" fo:margin-left="0cm" table:align="left"/>
    </style:style>
    <style:style style:name="Таблица1.A" style:family="table-column">
      <style:table-column-properties style:column-width="2.926cm"/>
    </style:style>
    <style:style style:name="Таблица1.C" style:family="table-column">
      <style:table-column-properties style:column-width="2.92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.F1" style:family="table-cell">
      <style:table-cell-properties fo:padding="0.097cm" fo:border="0.5pt solid #000000" style:writing-mode="lr-tb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.3" style:family="table-row">
      <style:table-row-properties style:min-row-height="0.757cm" style:use-optimal-row-height="false"/>
    </style:style>
    <style:style style:name="Таблица2" style:family="table">
      <style:table-properties style:width="17.533cm" fo:margin-left="0cm" table:align="left"/>
    </style:style>
    <style:style style:name="Таблица2.A" style:family="table-column">
      <style:table-column-properties style:column-width="5.844cm"/>
    </style:style>
    <style:style style:name="Таблица2.C" style:family="table-column">
      <style:table-column-properties style:column-width="5.846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263cm" fo:margin-left="1.27cm" table:align="left"/>
    </style:style>
    <style:style style:name="Таблица3.A" style:family="table-column">
      <style:table-column-properties style:column-width="5.473cm"/>
    </style:style>
    <style:style style:name="Таблица3.B" style:family="table-column">
      <style:table-column-properties style:column-width="5.394cm"/>
    </style:style>
    <style:style style:name="Таблица3.C" style:family="table-column">
      <style:table-column-properties style:column-width="5.396cm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263cm" fo:margin-left="1.27cm" table:align="left"/>
    </style:style>
    <style:style style:name="Таблица4.A" style:family="table-column">
      <style:table-column-properties style:column-width="5.473cm"/>
    </style:style>
    <style:style style:name="Таблица4.B" style:family="table-column">
      <style:table-column-properties style:column-width="5.394cm"/>
    </style:style>
    <style:style style:name="Таблица4.C" style:family="table-column">
      <style:table-column-properties style:column-width="5.396cm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263cm" fo:margin-left="1.27cm" table:align="left"/>
    </style:style>
    <style:style style:name="Таблица5.A" style:family="table-column">
      <style:table-column-properties style:column-width="5.473cm"/>
    </style:style>
    <style:style style:name="Таблица5.B" style:family="table-column">
      <style:table-column-properties style:column-width="5.394cm"/>
    </style:style>
    <style:style style:name="Таблица5.C" style:family="table-column">
      <style:table-column-properties style:column-width="5.396cm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533cm" fo:margin-left="0cm" table:align="left"/>
    </style:style>
    <style:style style:name="Таблица6.A" style:family="table-column">
      <style:table-column-properties style:column-width="8.767cm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7.533cm" fo:margin-left="0cm" table:align="left"/>
    </style:style>
    <style:style style:name="Таблица7.A" style:family="table-column">
      <style:table-column-properties style:column-width="8.767cm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7.533cm" fo:margin-left="0cm" table:align="left"/>
    </style:style>
    <style:style style:name="Таблица8.A" style:family="table-column">
      <style:table-column-properties style:column-width="8.767cm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P5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</style:style>
    <style:style style:name="P6" style:family="paragraph" style:parent-style-name="Standard">
      <style:paragraph-properties fo:margin-right="0.499cm" fo:text-align="center" style:justify-single-word="false" fo:orphans="0" fo:widows="0"/>
    </style:style>
    <style:style style:name="P7" style:family="paragraph" style:parent-style-name="Standard">
      <style:paragraph-properties fo:margin-right="0.499cm" fo:text-align="center" style:justify-single-word="false" fo:orphans="0" fo:widows="0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501cm"/>
          <style:tab-stop style:position="2cm"/>
          <style:tab-stop style:position="2.251cm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text-align="justify" style:justify-single-word="false" fo:orphans="0" fo:widows="0" fo:text-indent="1.251cm" style:auto-text-indent="false">
        <style:tab-stops>
          <style:tab-stop style:position="2.699cm"/>
          <style:tab-stop style:position="12.383cm"/>
        </style:tab-stops>
      </style:paragraph-properties>
      <style:text-properties style:font-name="Times New Roman" fo:font-size="10pt" style:font-name-asian="Times New Roman" style:font-size-asian="10pt" style:language-asian="ru" style:country-asian="RU" style:font-name-complex="Times New Roman" style:font-size-complex="14pt" style:language-complex="ru" style:country-complex="RU"/>
    </style:style>
    <style:style style:name="P10" style:family="paragraph" style:parent-style-name="Standard">
      <style:paragraph-properties fo:text-align="center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1" style:family="paragraph" style:parent-style-name="Standard">
      <style:paragraph-properties fo:text-align="end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2" style:family="paragraph" style:parent-style-name="Standard">
      <style:paragraph-properties fo:text-align="justify" style:justify-single-word="false" fo:orphans="0" fo:widows="0" fo:text-indent="1.251cm" style:auto-text-indent="false">
        <style:tab-stops>
          <style:tab-stop style:position="4.752cm"/>
          <style:tab-stop style:position="12.383cm"/>
        </style:tab-stops>
      </style:paragraph-properties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3" style:family="paragraph" style:parent-style-name="Standard">
      <style:paragraph-properties fo:margin-left="8.001cm" fo:text-align="justify" style:justify-single-word="false" fo:orphans="0" fo:widows="0">
        <style:tab-stops>
          <style:tab-stop style:position="2.699cm"/>
          <style:tab-stop style:position="12.383cm"/>
        </style:tab-stops>
      </style:paragraph-properties>
    </style:style>
    <style:style style:name="P14" style:family="paragraph" style:parent-style-name="Standard">
      <style:paragraph-properties fo:margin-left="8.001cm" fo:text-align="justify" style:justify-single-word="false" fo:orphans="0" fo:widows="0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size-asian="14pt" style:font-name-complex="Times New Roman"/>
    </style:style>
    <style:style style:name="P15" style:family="paragraph" style:parent-style-name="Standard">
      <style:paragraph-properties fo:margin-left="8.001cm" fo:orphans="0" fo:widows="0">
        <style:tab-stops>
          <style:tab-stop style:position="2.699cm"/>
          <style:tab-stop style:position="12.383cm"/>
        </style:tab-stops>
      </style:paragraph-properties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2.699cm"/>
          <style:tab-stop style:position="12.383cm"/>
        </style:tab-stops>
      </style:paragraph-properties>
    </style:style>
    <style:style style:name="P17" style:family="paragraph" style:parent-style-name="Standard">
      <style:paragraph-properties fo:margin-right="0.508cm" fo:margin-top="0.002cm" fo:margin-bottom="0.282cm" style:contextual-spacing="false" fo:text-align="center" style:justify-single-word="false"/>
      <style:text-properties style:font-name="Times New Roman" style:font-name-asian="Times New Roman" style:language-asian="ru" style:country-asian="RU" style:font-name-complex="Times New Roman" style:font-size-complex="14pt" style:language-complex="ru" style:country-complex="RU"/>
    </style:style>
    <style:style style:name="P18" style:family="paragraph" style:parent-style-name="Обычный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right="0.508cm" fo:margin-top="0.002cm" fo:margin-bottom="0.282cm" style:contextual-spacing="false" fo:text-align="center" style:justify-single-word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Text_20_body">
      <style:paragraph-properties fo:margin-right="0.508cm" fo:margin-top="0.002cm" fo:margin-bottom="0.282cm" style:contextual-spacing="false" fo:text-align="justify" style:justify-single-word="false"/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Heading_20_1">
      <style:text-properties fo:font-size="16pt" style:font-size-asian="16pt" style:font-size-complex="16pt"/>
    </style:style>
    <style:style style:name="P25" style:family="paragraph" style:parent-style-name="Text_20_body">
      <style:paragraph-properties fo:margin-right="0.508cm" fo:margin-top="0.002cm" fo:margin-bottom="0.282cm" style:contextual-spacing="false"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Heading_20_2">
      <style:text-properties fo:font-size="14pt" style:font-size-asian="14pt" style:font-size-complex="14pt"/>
    </style:style>
    <style:style style:name="P29" style:family="paragraph" style:parent-style-name="Text_20_body" style:list-style-name="L3">
      <style:paragraph-properties fo:text-align="justify" style:justify-single-word="false"/>
    </style:style>
    <style:style style:name="P30" style:family="paragraph" style:parent-style-name="Text_20_body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ext_20_body">
      <style:text-properties style:font-name="Times New Roman" fo:font-size="14pt" style:font-size-asian="14pt" style:font-size-complex="14pt"/>
    </style:style>
    <style:style style:name="P32" style:family="paragraph" style:parent-style-name="Text_20_body" style:list-style-name="L3"/>
    <style:style style:name="P33" style:family="paragraph" style:parent-style-name="Heading_20_2">
      <style:paragraph-properties fo:text-align="start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 style:list-style-name="L4">
      <style:paragraph-properties fo:margin-left="0cm" fo:text-align="justify" style:justify-single-word="false" fo:text-indent="0.9cm" style:auto-text-indent="false">
        <style:tab-stops>
          <style:tab-stop style:position="0.503cm"/>
        </style:tab-stops>
      </style:paragraph-properties>
    </style:style>
    <style:style style:name="P36" style:family="paragraph" style:parent-style-name="Standard">
      <style:paragraph-properties fo:text-align="justify" style:justify-single-word="false" fo:text-indent="0.9cm" style:auto-text-indent="false">
        <style:tab-stops>
          <style:tab-stop style:position="0.503cm"/>
        </style:tab-stops>
      </style:paragraph-properties>
    </style:style>
    <style:style style:name="P37" style:family="paragraph" style:parent-style-name="Standard">
      <style:paragraph-properties fo:text-align="justify" style:justify-single-word="false" fo:text-indent="0.9cm" style:auto-text-indent="false">
        <style:tab-stops>
          <style:tab-stop style:position="0.503cm"/>
        </style:tab-stops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Standard" style:list-style-name="L5">
      <style:paragraph-properties fo:margin-left="0cm" fo:text-align="justify" style:justify-single-word="false" fo:text-indent="0.9cm" style:auto-text-indent="false">
        <style:tab-stops/>
      </style:paragraph-properties>
    </style:style>
    <style:style style:name="P40" style:family="paragraph" style:parent-style-name="Standard">
      <style:paragraph-properties fo:text-align="justify" style:justify-single-word="false" fo:text-indent="0.9cm" style:auto-text-indent="false"/>
    </style:style>
    <style:style style:name="P41" style:family="paragraph" style:parent-style-name="Standard">
      <style:paragraph-properties fo:text-align="justify" style:justify-single-word="false" fo:text-indent="-0.6cm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3" style:family="paragraph" style:parent-style-name="Standard" style:list-style-name="L6">
      <style:paragraph-properties fo:margin-left="0cm" fo:text-align="justify" style:justify-single-word="false" fo:text-indent="0.801cm" style:auto-text-indent="false">
        <style:tab-stops/>
      </style:paragraph-properties>
    </style:style>
    <style:style style:name="P44" style:family="paragraph" style:parent-style-name="Standard">
      <style:paragraph-properties fo:text-align="justify" style:justify-single-word="false" fo:text-indent="0.801cm" style:auto-text-indent="false"/>
    </style:style>
    <style:style style:name="P45" style:family="paragraph" style:parent-style-name="Standard" style:list-style-name="L7">
      <style:paragraph-properties fo:margin-left="0cm" fo:text-align="justify" style:justify-single-word="false" fo:text-indent="0.7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text-align="justify" style:justify-single-word="false" fo:text-indent="0.7cm" style:auto-text-indent="false"/>
    </style:style>
    <style:style style:name="P47" style:family="paragraph" style:parent-style-name="Standard" style:list-style-name="L7">
      <style:paragraph-properties fo:margin-left="0cm" fo:text-align="justify" style:justify-single-word="false" fo:text-indent="0.7cm" style:auto-text-indent="false">
        <style:tab-stops/>
      </style:paragraph-properties>
    </style:style>
    <style:style style:name="P48" style:family="paragraph" style:parent-style-name="Standard" style:list-style-name="L8">
      <style:paragraph-properties fo:margin-left="0cm" fo:text-align="justify" style:justify-single-word="false" fo:text-indent="0.499cm" style:auto-text-indent="false">
        <style:tab-stops/>
      </style:paragraph-properties>
    </style:style>
    <style:style style:name="P49" style:family="paragraph" style:parent-style-name="Standard">
      <style:paragraph-properties fo:text-align="justify" style:justify-single-word="false" fo:text-indent="0.499cm" style:auto-text-indent="false"/>
    </style:style>
    <style:style style:name="P50" style:family="paragraph" style:parent-style-name="Heading_20_3">
      <style:paragraph-properties fo:text-align="justify" style:justify-single-word="false"/>
    </style:style>
    <style:style style:name="P51" style:family="paragraph" style:parent-style-name="Text_20_body">
      <style:text-properties fo:font-size="14pt" style:font-size-asian="14pt" style:font-size-complex="14pt"/>
    </style:style>
    <style:style style:name="P52" style:family="paragraph" style:parent-style-name="Standard">
      <style:text-properties fo:font-size="14pt" style:font-size-asian="14pt" style:font-size-complex="14pt"/>
    </style:style>
    <style:style style:name="P53" style:family="paragraph" style:parent-style-name="Text_20_body" style:list-style-name="L9">
      <style:paragraph-properties fo:margin-left="-1.3cm" fo:text-indent="1.199cm" style:auto-text-indent="false">
        <style:tab-stops>
          <style:tab-stop style:position="2.602cm"/>
        </style:tab-stops>
      </style:paragraph-properties>
    </style:style>
    <style:style style:name="P54" style:family="paragraph" style:parent-style-name="Text_20_body" style:list-style-name="L10">
      <style:paragraph-properties fo:margin-left="-1.3cm" fo:text-indent="1.3cm" style:auto-text-indent="false">
        <style:tab-stops>
          <style:tab-stop style:position="0.993cm"/>
          <style:tab-stop style:position="1.808cm"/>
          <style:tab-stop style:position="2.381cm"/>
        </style:tab-stops>
      </style:paragraph-properties>
    </style:style>
    <style:style style:name="P55" style:family="paragraph" style:parent-style-name="Text_20_body" style:list-style-name="L11">
      <style:paragraph-properties fo:margin-left="-1.101cm" fo:text-indent="1.101cm" style:auto-text-indent="false">
        <style:tab-stops/>
      </style:paragraph-properties>
    </style:style>
    <style:style style:name="P5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7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0" style:family="paragraph" style:parent-style-name="Heading_20_2">
      <style:paragraph-properties fo:text-align="justify" style:justify-single-word="false" fo:text-indent="1.251cm" style:auto-text-indent="false"/>
      <style:text-properties fo:font-size="14pt" style:font-size-asian="14pt" style:font-size-complex="14pt"/>
    </style:style>
    <style:style style:name="P61" style:family="paragraph" style:parent-style-name="Standard">
      <style:paragraph-properties fo:margin-top="0cm" fo:margin-bottom="0.247cm" style:contextual-spacing="false" fo:text-indent="1.251cm" style:auto-text-indent="false"/>
      <style:text-properties fo:font-size="14pt" style:font-size-asian="14pt" style:font-size-complex="14pt"/>
    </style:style>
    <style:style style:name="P62" style:family="paragraph" style:parent-style-name="Standard">
      <style:paragraph-properties fo:margin-top="0cm" fo:margin-bottom="0.247cm" style:contextual-spacing="false"/>
      <style:text-properties fo:font-size="14pt" style:font-size-asian="14pt" style:font-size-complex="14pt"/>
    </style:style>
    <style:style style:name="P63" style:family="paragraph" style:parent-style-name="Standard">
      <style:paragraph-properties fo:margin-top="0cm" fo:margin-bottom="0.247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.247cm" style:contextual-spacing="false"/>
      <style:text-properties fo:font-size="14pt" fo:font-style="italic" style:font-size-asian="14pt" style:font-style-asian="italic" style:font-size-complex="14pt" style:font-style-complex="italic"/>
    </style:style>
    <style:style style:name="P65" style:family="paragraph" style:parent-style-name="Standard">
      <style:paragraph-properties fo:margin-top="0cm" fo:margin-bottom="0.247cm" style:contextual-spacing="false"/>
    </style:style>
    <style:style style:name="P66" style:family="paragraph" style:parent-style-name="Text_20_body">
      <style:paragraph-properties fo:text-indent="1.251cm" style:auto-text-indent="false"/>
      <style:text-properties fo:font-size="14pt" style:font-size-asian="14pt" style:font-size-complex="14pt"/>
    </style:style>
    <style:style style:name="P67" style:family="paragraph" style:parent-style-name="Text_20_body">
      <style:paragraph-properties fo:text-indent="1.251cm" style:auto-text-indent="false"/>
    </style:style>
    <style:style style:name="P68" style:family="paragraph" style:parent-style-name="Text_20_body">
      <style:paragraph-properties fo:margin-left="1.27cm">
        <style:tab-stops/>
      </style:paragraph-properties>
      <style:text-properties fo:font-size="14pt" style:font-size-asian="14pt" style:font-size-complex="14pt"/>
    </style:style>
    <style:style style:name="P69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0" style:family="paragraph" style:parent-style-name="Text_20_body" style:list-style-name="L12">
      <style:text-properties fo:font-size="14pt" style:font-size-asian="14pt" style:font-size-complex="14pt"/>
    </style:style>
    <style:style style:name="P71" style:family="paragraph" style:parent-style-name="Text_20_body">
      <style:text-properties fo:language="en" fo:country="US"/>
    </style:style>
    <style:style style:name="P72" style:family="paragraph" style:parent-style-name="Text_20_body">
      <style:paragraph-properties fo:text-align="end" style:justify-single-word="false"/>
    </style:style>
    <style:style style:name="P73" style:family="paragraph" style:parent-style-name="Standard" style:list-style-name="Numbering_20_123">
      <style:paragraph-properties fo:margin-left="1.3cm" fo:text-indent="0.4cm" style:auto-text-indent="false">
        <style:tab-stops>
          <style:tab-stop style:position="0.265cm"/>
        </style:tab-stops>
      </style:paragraph-properties>
    </style:style>
    <style:style style:name="T1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/>
    </style:style>
    <style:style style:name="T4" style:family="text">
      <style:text-properties style:font-name="Times New Roman" fo:font-size="14pt" style:font-size-asian="14pt" style:font-name-complex="Times New Roman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4pt" fo:font-weight="normal" style:font-name-asian="Times New Roman" style:font-size-asian="14pt" style:language-asian="ru" style:country-asian="RU" style:font-weight-asian="normal" style:font-name-complex="Times New Roman" style:font-size-complex="14pt" style:language-complex="ru" style:country-complex="RU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 officeooo:rsid="0014fc35"/>
    </style:style>
    <style:style style:name="T16" style:family="text">
      <style:text-properties fo:font-size="14pt" style:font-size-asian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3.649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4.9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6.151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7.401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8.652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9.902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11.153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2.404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3.65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Министерство образования Московской области</text:span></text:span></text:p>
      <text:p text:style-name="P2"><text:span text:style-name="Основной_20_шрифт_20_абзаца"><text:span text:style-name="T1">Государственное бюджетное профессиональное образовательное учреждение Московской области Физико-технический колледж</text:span></text:span></text:p>
      <text:p text:style-name="P3"/>
      <text:p text:style-name="P2"><text:span text:style-name="Основной_20_шрифт_20_абзаца"><text:span text:style-name="T1">(ГБПОУ МО «Физтех-колледж»)</text:span></text:span>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6"><text:span text:style-name="Основной_20_шрифт_20_абзаца"><text:span text:style-name="T2">Проект </text:span></text:span><text:span text:style-name="Основной_20_шрифт_20_абзаца"><text:span text:style-name="T3">по</text:span></text:span></text:p>
      <text:p text:style-name="P7">теме:</text:p>
      <text:p text:style-name="P8">«Разработка рекомендательного веб-сервиса по фильмам»</text:p>
      <text:p text:style-name="P9"/>
      <text:p text:style-name="P9"/>
      <text:p text:style-name="P9"/>
      <text:p text:style-name="P10"/>
      <text:p text:style-name="P10"/>
      <text:p text:style-name="P10"/>
      <text:p text:style-name="P11"/>
      <text:p text:style-name="P10"/>
      <text:p text:style-name="P10"/>
      <text:p text:style-name="P12"/>
      <text:p text:style-name="P13"><text:span text:style-name="Основной_20_шрифт_20_абзаца"><text:span text:style-name="T4">Выполнил: студент группы ИСП-42 Ишевских Никита Сергеевич</text:span></text:span></text:p>
      <text:p text:style-name="P14"/>
      <text:p text:style-name="P13"><text:span text:style-name="Основной_20_шрифт_20_абзаца"><text:span text:style-name="T4">Руководитель: преподаватель</text:span></text:span></text:p>
      <text:p text:style-name="P13"><text:span text:style-name="Основной_20_шрифт_20_абзаца"><text:span text:style-name="T4">Базяк Галина Владимировна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Основной_20_шрифт_20_абзаца"><text:span text:style-name="T4">Долгопрудный 2026</text:span></text:span></text:p>
      <text:p text:style-name="P16"/>
      <text:p text:style-name="P17"/>
      <text:p text:style-name="P17"/>
      <text:p text:style-name="P17"/>
      <text:p text:style-name="P17"><text:s text:c="99"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<text:soft-page-break/>Оглавление</text:p>
          </text:index-title>
          <text:p text:style-name="P18"><text:a xlink:type="simple" xlink:href="#__RefHeading___Toc734_1761186612" text:style-name="Index_20_Link" text:visited-style-name="Index_20_Link">Введение<text:tab/>3</text:a></text:p>
          <text:p text:style-name="P18"><text:a xlink:type="simple" xlink:href="#__RefHeading___Toc736_1761186612" text:style-name="Index_20_Link" text:visited-style-name="Index_20_Link">РАЗДЕЛ 1. ТЕОРЕТИЧЕСКИЕ ОСНОВЫ РЕАЛИЗАЦИИ ПРОЕКТA<text:tab/>4</text:a></text:p>
          <text:p text:style-name="P18"><text:a xlink:type="simple" xlink:href="#__RefHeading___Toc738_1761186612" text:style-name="Index_20_Link" text:visited-style-name="Index_20_Link"><text:s/>1.1. Понятие и назначение рекомендательных систем<text:tab/>4</text:a></text:p>
          <text:p text:style-name="P18"><text:a xlink:type="simple" xlink:href="#__RefHeading___Toc742_1761186612" text:style-name="Index_20_Link" text:visited-style-name="Index_20_Link"><text:s/>1.2 Классификация методов рекомендаций<text:tab/>5</text:a></text:p>
          <text:p text:style-name="P18"><text:a xlink:type="simple" xlink:href="#__RefHeading___Toc744_1761186612" text:style-name="Index_20_Link" text:visited-style-name="Index_20_Link"><text:s/>1.3 Специфика предметной области «Фильмы» для рекомендаций.<text:tab/>6</text:a></text:p>
          <text:p text:style-name="P18"><text:a xlink:type="simple" xlink:href="#__RefHeading___Toc1386_6113702" text:style-name="Index_20_Link" text:visited-style-name="Index_20_Link"><text:s/>1.4 Математические модели и алгоритмы, используемые в рекомендательных системах<text:tab/>11</text:a></text:p>
          <text:p text:style-name="P18"><text:a xlink:type="simple" xlink:href="#__RefHeading___Toc5093_2666258103" text:style-name="Index_20_Link" text:visited-style-name="Index_20_Link">РАЗДЕЛ 2. ПРАКТИЧЕСКАЯ ЧАСТЬ<text:tab/>14</text:a></text:p>
          <text:p text:style-name="P18"><text:a xlink:type="simple" xlink:href="#__RefHeading___Toc3811_2666258103" text:style-name="Index_20_Link" text:visited-style-name="Index_20_Link">2.1 Архитектура и технологический стек веб-сервиса<text:tab/>14</text:a></text:p>
          <text:p text:style-name="P18"><text:a xlink:type="simple" xlink:href="#__RefHeading___Toc3813_2666258103" text:style-name="Index_20_Link" text:visited-style-name="Index_20_Link">2.2 Проектирование базы данных<text:tab/>15</text:a></text:p>
          <text:p text:style-name="P18"><text:a xlink:type="simple" xlink:href="#__RefHeading___Toc3815_2666258103" text:style-name="Index_20_Link" text:visited-style-name="Index_20_Link">2.3 Принцип работы системы рекомендаций<text:tab/>17</text:a></text:p>
          <text:p text:style-name="P18"><text:a xlink:type="simple" xlink:href="#__RefHeading___Toc3817_2666258103" text:style-name="Index_20_Link" text:visited-style-name="Index_20_Link">2.4 Реализация веб-интерфейса<text:tab/>17</text:a></text:p>
          <text:p text:style-name="P18"><text:a xlink:type="simple" xlink:href="#__RefHeading___Toc3819_2666258103" text:style-name="Index_20_Link" text:visited-style-name="Index_20_Link">2.5 Интеграция с внешними API для обогащения метаданных<text:tab/>18</text:a></text:p>
          <text:p text:style-name="P18"><text:a xlink:type="simple" xlink:href="#__RefHeading___Toc3821_2666258103" text:style-name="Index_20_Link" text:visited-style-name="Index_20_Link">2.6 Функциональное тестирование системы<text:tab/>19</text:a></text:p>
          <text:p text:style-name="P18"><text:a xlink:type="simple" xlink:href="#__RefHeading___Toc3823_2666258103" text:style-name="Index_20_Link" text:visited-style-name="Index_20_Link">2.7 Инструкция по развёртыванию и эксплуатации<text:tab/>19</text:a></text:p>
          <text:p text:style-name="P18"><text:a xlink:type="simple" xlink:href="#__RefHeading___Toc746_1761186612" text:style-name="Index_20_Link" text:visited-style-name="Index_20_Link"><text:tab/>21</text:a></text:p>
          <text:p text:style-name="P18"><text:a xlink:type="simple" xlink:href="#__RefHeading___Toc3825_2666258103" text:style-name="Index_20_Link" text:visited-style-name="Index_20_Link">ПРИЛОЖЕНИЕ А. Исходный код основных модулей<text:tab/>21</text:a></text:p>
          <text:p text:style-name="P18"><text:a xlink:type="simple" xlink:href="#__RefHeading___Toc3827_2666258103" text:style-name="Index_20_Link" text:visited-style-name="Index_20_Link">ПРИЛОЖЕНИЕ Б. Скриншоты интерфейса системы<text:tab/>29</text:a></text:p>
          <text:p text:style-name="P18"><text:a xlink:type="simple" xlink:href="#__RefHeading___Toc3829_2666258103" text:style-name="Index_20_Link" text:visited-style-name="Index_20_Link">СПИСОК ИНФОРМАЦИОННЫХ ИСТОЧНИКОВ<text:tab/>31</text:a></text:p>
        </text:index-body>
      </text:table-of-content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67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0" text:outline-level="1"><text:bookmark-start text:name="__RefHeading___Toc734_1761186612"/>Введение <text:s/><text:bookmark-end text:name="__RefHeading___Toc734_1761186612"/></text:h>
      <text:p text:style-name="P21"><text:tab/>В современном мире объем видеоконтента растет экспоненциально. Ежедневно на стриминговых платформах (таких как Netflix, Кинопоиск, Amazon Prime) появляются тысячи новых фильмов и сериалов. В таких условиях пользователю становится все сложнее самостоятельно находить интересные для просмотра картины. Решением этой проблемы являются рекомендательные системы — алгоритмы, которые анализируют предпочтения пользователя и историю его просмотров, чтобы предлагать персонализированный контент. Создание эффективного рекомендательного сервиса позволяет не только улучшить пользовательский опыт, но и повысить вовлеченность аудитории. Данный проект посвящен разработке веб-сервиса на языке Python, который будет рекомендовать фильмы на основе анализа их жанров, описаний и оценок других пользователей.</text:p>
      <text:p text:style-name="P22"><text:span text:style-name="Strong_20_Emphasis"><text:span text:style-name="T5">Цель</text:span></text:span><text:span text:style-name="Strong_20_Emphasis"><text:span text:style-name="T6">: </text:span></text:span><text:span text:style-name="Основной_20_шрифт_20_абзаца"><text:span text:style-name="T6">Разработать и реализовать веб-сервис для рекомендации фильмов, использующий алгоритмы машинного обучения для предоставления персонализированных подборок.</text:span></text:span></text:p>
      <text:p text:style-name="P22"><text:span text:style-name="Strong_20_Emphasis"><text:span text:style-name="T5">Задачи проекта:</text:span></text:span></text:p>
      <text:list text:style-name="L1">
        <text:list-item>
          <text:p text:style-name="P23">Провести анализ предметной области и существующих подходов к построению рекомендательных систем (фильтрация, контентные методы).</text:p>
        </text:list-item>
        <text:list-item>
          <text:p text:style-name="P23">Выбрать и обосновать набор инструментов и библиотек Python (Pandas, Scikit-learn, Surprise) для реализации алгоритмов.</text:p>
        </text:list-item>
        <text:list-item>
          <text:p text:style-name="P23">Выполнить предобработку и анализ датасета с информацией о фильмах (например, MovieLens или Кинопоиск).</text:p>
        </text:list-item>
        <text:list-item>
          <text:p text:style-name="P23">Реализовать алгоритмы контентной и/или коллаборативной фильтрации для генерации рекомендаций.</text:p>
        </text:list-item>
        <text:list-item>
          <text:p text:style-name="P23"><text:soft-page-break/>Разработать веб-интерфейс (фреймворки Flask или Django) для взаимодействия пользователя с системой.</text:p>
        </text:list-item>
        <text:list-item>
          <text:p text:style-name="P23">Провести тестирование разработанного сервиса и оценить точность его рекомендаций.</text:p>
        </text:list-item>
      </text:list>
      <text:h text:style-name="P24" text:outline-level="1"><text:bookmark-start text:name="__RefHeading___Toc736_1761186612"/>РАЗДЕЛ 1. ТЕОРЕТИЧЕСКИЕ ОСНОВЫ РЕАЛИЗАЦИИ ПРОЕКТA<text:bookmark-end text:name="__RefHeading___Toc736_1761186612"/></text:h>
      <text:h text:style-name="Heading_20_2" text:outline-level="2"><text:bookmark-start text:name="__RefHeading___Toc738_1761186612"/><text:span text:style-name="Strong_20_Emphasis"><text:span text:style-name="T6"><text:tab/></text:span></text:span><text:span text:style-name="Основной_20_шрифт_20_абзаца"><text:span text:style-name="T7">1.1. Понятие и назначение рекомендательных систем</text:span></text:span><text:bookmark-end text:name="__RefHeading___Toc738_1761186612"/></text:h>
      <text:p text:style-name="P25"><text:span text:style-name="Strong_20_Emphasis"><text:span text:style-name="T8">В научной литературе под рекомендательной системой понимают класс алгоритмов и программных средств, которые на основе анализа накопленных данных о поведении пользователей, характеристиках объектов и контексте взаимодействия формируют прогноз относительно полезности или желательности тех или иных объектов для активного пользователя и предоставляют ему ранжированный список рекомендаций.</text:span></text:span></text:p>
      <text:p text:style-name="P25"><text:span text:style-name="Strong_20_Emphasis"><text:span text:style-name="T8"><text:tab/></text:span></text:span><text:span text:style-name="Основной_20_шрифт_20_абзаца"><text:span text:style-name="T6">Рекомендательную систему можно рассматривать как частный случай фильтрации информации. В отличие от простого поиска, где пользователь выступает с активным запросом, рекомендательная система работает в </text:span></text:span><text:span text:style-name="Strong_20_Emphasis"><text:span text:style-name="T5">предиктивном режиме</text:span></text:span><text:span text:style-name="Основной_20_шрифт_20_абзаца"><text:span text:style-name="T6">: она предсказывает, какие именно объекты из всего множества доступных могут заинтересовать пользователя в данный момент, основываясь на его предыдущем опыте и опыте других пользователей со схожими предпочтениями.</text:span></text:span></text:p>
      <text:p text:style-name="P25"><text:span text:style-name="Основной_20_шрифт_20_абзаца"><text:span text:style-name="T6"><text:tab/>Ключевая цель любой рекомендательной системы – </text:span></text:span><text:span text:style-name="Strong_20_Emphasis"><text:span text:style-name="T5">персонализация</text:span></text:span><text:span text:style-name="Основной_20_шрифт_20_абзаца"><text:span text:style-name="T6">. Она заключается в том, чтобы разные пользователи, обратившиеся к системе, получали разные рекомендации, отражающие их индивидуальные вкусы. Например, одному зрителю сервис предложит новую комедию, а другому – документальный фильм о космосе, хотя оба в данный момент просматривают один и тот же раздел.</text:span></text:span></text:p>
      <text:p text:style-name="Standard"><text:bookmark-start text:name="__RefHeading___Toc740_1761186612"/><text:span text:style-name="Основной_20_шрифт_20_абзаца"><text:span text:style-name="T6"><text:s/><text:tab/></text:span></text:span><text:span text:style-name="Основной_20_шрифт_20_абзаца"><text:span text:style-name="T7">Основные функции и задачи</text:span></text:span><text:bookmark-end text:name="__RefHeading___Toc740_1761186612"/></text:p>
      <text:p text:style-name="P26">Функционально рекомендательная система решает несколько взаимосвязанных задач:</text:p>
      <text:list text:style-name="L2">
        <text:list-item>
          <text:p text:style-name="P27"><text:span text:style-name="Strong_20_Emphasis"><text:span text:style-name="T5">Прогнозирование рейтинга .</text:span></text:span><text:span text:style-name="Основной_20_шрифт_20_абзаца"><text:span text:style-name="T6"> Система пытается предсказать, какую оценку пользователь поставил бы объекту, с которым он ещё не взаимодействовал. Эта оценка может быть явной (например, количество звёзд) или неявной (время просмотра, факт клика). На основе прогнозируемых оценок объекты ранжируются.</text:span></text:span></text:p>
        </text:list-item>
        <text:list-item>
          <text:p text:style-name="P27"><text:span text:style-name="Strong_20_Emphasis"><text:span text:style-name="T5">Формирование списка рекомендаций .</text:span></text:span><text:span text:style-name="Основной_20_шрифт_20_абзаца"><text:span text:style-name="T6"> Система выдаёт пользователю упорядоченный список из N объектов, которые, по её мнению, будут для </text:span></text:span><text:soft-page-break/><text:span text:style-name="Основной_20_шрифт_20_абзаца"><text:span text:style-name="T6">него наиболее релевантны. При этом точное значение оценки может не вычисляться – достаточно лишь относительного порядка.</text:span></text:span></text:p>
        </text:list-item>
        <text:list-item>
          <text:p text:style-name="P27"><text:span text:style-name="Strong_20_Emphasis"><text:span text:style-name="T5">Объяснение рекомендаций .</text:span></text:span><text:span text:style-name="Основной_20_шрифт_20_абзаца"><text:span text:style-name="T6"> Современные системы часто предоставляют пользователю обоснование того, почему предложен тот или иной объект (например: «этот фильм вам понравится, потому что вы смотрели другие фильмы этого режиссёра»). Это повышает доверие к системе и удовлетворённость пользователя.</text:span></text:span></text:p>
        </text:list-item>
        <text:list-item>
          <text:p text:style-name="P27"><text:span text:style-name="Strong_20_Emphasis"><text:span text:style-name="T5">Адаптация к изменению предпочтений.</text:span></text:span><text:span text:style-name="Основной_20_шрифт_20_абзаца"><text:span text:style-name="T6"> Интересы пользователя не статичны, они меняются со временем. Рекомендательная система должна отслеживать эти изменения и соответствующим образом корректировать выдачу.</text:span></text:span></text:p>
        </text:list-item>
      </text:list>
      <text:h text:style-name="P28" text:outline-level="2"><text:bookmark-start text:name="__RefHeading___Toc742_1761186612"/><text:tab/>1.2 <text:s/>Классификация методов рекомендаций<text:bookmark-end text:name="__RefHeading___Toc742_1761186612"/></text:h>
      <text:p text:style-name="P26"><text:tab/>Коллаборативная фильтрация является одним из самых ранних и наиболее изученных методов рекомендаций. Основополагающая идея заключается в использовании известных оценок или действий сообщества пользователей для предсказания предпочтений конкретного пользователя. Термин «коллаборативная» (совместная) отражает тот факт, что система опирается на коллективный опыт множества людей.</text:p>
      <text:p text:style-name="P26"><text:tab/>Математически задача формулируется следующим образом: имеется множество пользователей U={u1​,u2​,...,um​} и множество объектов I={i1​,i2​,...,in​}. Для некоторых пар (пользователь, объект) известна оценка r ui​, которую пользователь u поставил объекту i. Оценка может быть явной (например, число звезд от 1 до 5) или неявной (просмотр, клик, покупка). Вся совокупность известных оценок образует матрицу R размерности m×n, которая, как правило, является крайне разреженной , так как каждый пользователь взаимодействует лишь с небольшим подмножеством объектов.</text:p>
      <text:p text:style-name="P26"><text:tab/>Коллаборативную фильтрацию принято делить на два больших класса: методы, основанные на памяти, и методы, основанные на модели.</text:p>
      <text:p text:style-name="P26"><text:tab/>Контентная фильтрация (Content‑Based Filtering, CBF) основывается на анализе характеристик (признаков) объектов и построении профиля предпочтений пользователя. В отличие от коллаборативной фильтрации, которая использует только оценки, контентный подход не требует данных о других пользователях – рекомендации формируются исключительно на основе того, что данный пользователь любил раньше.</text:p>
      <text:p text:style-name="Text_20_body"><text:span text:style-name="Strong_20_Emphasis"><text:span text:style-name="T5">Принцип работы контентной фильтрации</text:span></text:span></text:p>
      <text:list text:style-name="L3">
        <text:list-item>
          <text:p text:style-name="P29"><text:span text:style-name="Strong_20_Emphasis"><text:span text:style-name="T5">Извлечение признаков объектов.</text:span></text:span><text:span text:style-name="Основной_20_шрифт_20_абзаца"><text:span text:style-name="T6"> Каждый объект (фильм) описывается набором признаков. Для фильмов это могут быть:</text:span></text:span></text:p>
          <text:list>
            <text:list-item>
              <text:p text:style-name="P30"><text:soft-page-break/>Структурированные метаданные: жанр, страна, год выпуска, режиссёр, актёры, продолжительность, возрастной рейтинг.</text:p>
            </text:list-item>
            <text:list-item>
              <text:p text:style-name="P30">Текстовые данные: название, синопсис, сюжет, отзывы критиков, ключевые слова.</text:p>
            </text:list-item>
            <text:list-item>
              <text:p text:style-name="P30">Визуальные данные: постеры, кадры, трейлеры (используются реже, но современные подходы включают и их).</text:p>
            </text:list-item>
            <text:list-item>
              <text:p text:style-name="P30">Аудиоданные: музыкальное сопровождение, наличие песен.</text:p>
            </text:list-item>
          </text:list>
        </text:list-item>
      </text:list>
      <text:p text:style-name="Text_20_body"><text:span text:style-name="Основной_20_шрифт_20_абзаца"><text:span text:style-name="T6">Наиболее распространённым подходом для текстовых данных является использование модели </text:span></text:span><text:span text:style-name="Strong_20_Emphasis"><text:span text:style-name="T5">TF‑IDF (Term Frequency – Inverse Document Frequency)</text:span></text:span><text:span text:style-name="Основной_20_шрифт_20_абзаца"><text:span text:style-name="T6">. Для каждого документа (описания фильма) строится вектор, где каждый компонент соответствует термину, а его значение равно произведению частоты термина в документе (TF) на обратную частоту документа во всей коллекции (IDF). Это позволяет выделить важные слова, характерные для конкретного фильма, и снизить вес общих слов.</text:span></text:span></text:p>
      <text:p text:style-name="P31">Более современные методы используют нейросетевые эмбеддинги (word2vec, GloVe, FastText) или контекстные эмбеддинги от трансформеров (BERT, SBERT), которые позволяют улавливать семантическую близость даже между разными словами.</text:p>
      <text:list text:continue-numbering="true" text:style-name="L3">
        <text:list-item>
          <text:p text:style-name="P29"><text:span text:style-name="Strong_20_Emphasis"><text:span text:style-name="T5">Построение профиля пользователя.</text:span></text:span><text:span text:style-name="Основной_20_шрифт_20_абзаца"><text:span text:style-name="T6"> На основе объектов, с которыми пользователь взаимодействовал положительно (высокие оценки, длительные просмотры), формируется его профиль. Чаще всего профиль представляется как усреднённый вектор признаков этих объектов</text:span></text:span></text:p>
        </text:list-item>
        <text:list-item>
          <text:p text:style-name="P32"><text:span text:style-name="Strong_20_Emphasis"><text:span text:style-name="T5">Генерация рекомендаций.</text:span></text:span><text:span text:style-name="Основной_20_шрифт_20_абзаца"><text:span text:style-name="T6"> Для каждого ещё не виденного пользователем объекта вычисляется степень его соответствия профилю пользователя. Чаще всего для этого используется </text:span></text:span><text:span text:style-name="Strong_20_Emphasis"><text:span text:style-name="T5">косинусная мера</text:span></text:span><text:span text:style-name="Основной_20_шрифт_20_абзаца"><text:span text:style-name="T6"> между вектором признаков объекта и вектором профиля. Объекты с наибольшей мерой сходства рекомендуются пользователю.</text:span></text:span></text:p>
        </text:list-item>
      </text:list>
      <text:h text:style-name="P33" text:outline-level="2"><text:bookmark-start text:name="__RefHeading___Toc744_1761186612"/><text:span text:style-name="Strong_20_Emphasis"><text:span text:style-name="T5"><text:tab/></text:span></text:span><text:span text:style-name="T9">1.3 Специфика предметной области «Фильмы» для рекомендаций.</text:span><text:bookmark-end text:name="__RefHeading___Toc744_1761186612"/></text:h>
      <text:p text:style-name="P34"><text:span text:style-name="Strong_20_Emphasis"><text:span text:style-name="T7"><text:tab/></text:span></text:span></text:p>
      <text:p text:style-name="P34"><text:span text:style-name="Strong_20_Emphasis"><text:span text:style-name="T7"><text:tab/></text:span></text:span><text:span text:style-name="Strong_20_Emphasis"><text:span text:style-name="T5">Разработка рекомендательной системы для фильмов требует глубокого понимания особенностей самой предметной области. Видеоконтент, в частности художественные фильмы, обладает рядом уникальных характеристик, которые отличают его от других объектов рекомендаций (товаров, музыки, новостей). Эти особенности влияют на выбор алгоритмов, методов предобработки данных и подходов к оценке качества. В данном параграфе рассматриваются характеристики фильмов как объектов рекомендаций, анализируются доступные источники данных исследуются особенности пользовательских предпочтений в этой сфере.</text:span></text:span></text:p>
      <text:p text:style-name="P34"><text:span text:style-name="Strong_20_Emphasis"><text:span text:style-name="T5"><text:tab/></text:span></text:span></text:p>
      <text:p text:style-name="P34"><text:soft-page-break/><text:span text:style-name="Strong_20_Emphasis"><text:span text:style-name="T5"><text:tab/>К </text:span></text:span><text:span text:style-name="Strong_20_Emphasis"><text:span text:style-name="T10">структурированным метаданным</text:span></text:span><text:span text:style-name="Strong_20_Emphasis"><text:span text:style-name="T5"> относятся атрибуты фильма, которые имеют четко определенный формат и могут быть легко обработаны компьютером:</text:span></text:span></text:p>
      <text:p text:style-name="P34"><text:span text:style-name="Strong_20_Emphasis"><text:span text:style-name="T5"><text:tab/> <text:s text:c="48"/></text:span></text:span></text:p>
      <text:list text:style-name="L4">
        <text:list-item>
          <text:p text:style-name="P35"><text:span text:style-name="Strong_20_Emphasis"><text:span text:style-name="T5">Жанровая принадлежность</text:span></text:span><text:span text:style-name="Основной_20_шрифт_20_абзаца"><text:span text:style-name="T6">. Жанры являются одним из наиболее значимых признаков при рекомендации фильмов. Исследования показывают, что интеграция жанровых признаков в модели машинного обучения позволяет существенно повысить точность прогнозирования предпочтений пользователей . Фильм может относиться к одному или нескольким жанрам (например, «боевик», «комедия», «драма», «фантастика»), причем жанровые комбинации часто создают уникальный характер кинокартины. В современных подходах жанровые признаки кодируются с помощью эмбеддингов, что позволяет нейросетевым моделям выявлять скрытые взаимосвязи между жанровыми предпочтениями пользователей .</text:span></text:span></text:p>
        </text:list-item>
      </text:list>
      <text:p text:style-name="P36"><text:span text:style-name="Strong_20_Emphasis"><text:span text:style-name="T5"><text:tab/></text:span></text:span></text:p>
      <text:list text:continue-numbering="true" text:style-name="L4">
        <text:list-item>
          <text:p text:style-name="P35"><text:span text:style-name="Strong_20_Emphasis"><text:span text:style-name="T5">Творческая команда</text:span></text:span><text:span text:style-name="Основной_20_шрифт_20_абзаца"><text:span text:style-name="T6">. Информация о режиссёре, сценаристах, операторах, композиторах и других ключевых участниках создания фильма является важным фактором для многих зрителей, которые могут иметь устойчивые предпочтения к работам конкретных авторов. Как отмечают исследователи, включение данных об актёрах и режиссёрах в векторы признаков позволяет системам рекомендовать фильмы, объединённые общими творческими коллективами .</text:span></text:span></text:p>
        </text:list-item>
      </text:list>
      <text:p text:style-name="P36"><text:span text:style-name="Strong_20_Emphasis"><text:span text:style-name="T5"><text:tab/></text:span></text:span></text:p>
      <text:list text:continue-numbering="true" text:style-name="L4">
        <text:list-item>
          <text:p text:style-name="P35"><text:span text:style-name="Strong_20_Emphasis"><text:span text:style-name="T5">Актёрский состав</text:span></text:span><text:span text:style-name="Основной_20_шрифт_20_абзаца"><text:span text:style-name="T6">. Наличие конкретных актёров существенно влияет на привлекательность фильма для определённой аудитории. Зрители часто формируют предпочтения к любимым исполнителям и склонны выбирать фильмы с их участием.</text:span></text:span></text:p>
        </text:list-item>
      </text:list>
      <text:p text:style-name="P36"><text:span text:style-name="Strong_20_Emphasis"><text:span text:style-name="T5"><text:tab/></text:span></text:span></text:p>
      <text:list text:continue-numbering="true" text:style-name="L4">
        <text:list-item>
          <text:p text:style-name="P35"><text:span text:style-name="Strong_20_Emphasis"><text:span text:style-name="T5">Хронометраж и год выпуска</text:span></text:span><text:span text:style-name="Основной_20_шрифт_20_абзаца"><text:span text:style-name="T6">. Продолжительность фильма и год его создания являются важными фильтрационными признаками. Некоторые пользователи предпочитают короткометражные фильмы или, наоборот, многочасовые эпопеи. Год выпуска отражает не только техническое качество, но и культурный контекст, стилистику, что важно для зрителей, отдающих предпочтение классике или современным новинкам .</text:span></text:span></text:p>
        </text:list-item>
      </text:list>
      <text:p text:style-name="P36"><text:span text:style-name="Strong_20_Emphasis"><text:span text:style-name="T5"><text:tab/></text:span></text:span></text:p>
      <text:list text:continue-numbering="true" text:style-name="L4">
        <text:list-item>
          <text:p text:style-name="P35"><text:span text:style-name="Strong_20_Emphasis"><text:span text:style-name="T5">Страна производства и язык</text:span></text:span><text:span text:style-name="Основной_20_шрифт_20_абзаца"><text:span text:style-name="T6">. Национальная принадлежность фильма часто коррелирует с определёнными культурными кодами, стилистикой повествования и эстетикой. Пользователи могут иметь устойчивые предпочтения к российскому, европейскому, азиатскому или голливудскому кинематографу.</text:span></text:span></text:p>
        </text:list-item>
      </text:list>
      <text:p text:style-name="P37"/>
      <text:list text:continue-numbering="true" text:style-name="L4">
        <text:list-item>
          <text:p text:style-name="P35"><text:span text:style-name="Strong_20_Emphasis"><text:span text:style-name="T5">Возрастной рейтинг</text:span></text:span><text:span text:style-name="Основной_20_шрифт_20_абзаца"><text:span text:style-name="T6">. Информация о возрастных ограничениях критически важна для фильтрации контента, нежелательного для определённых категорий пользователей (например, детей).</text:span></text:span></text:p>
        </text:list-item>
      </text:list>
      <text:p text:style-name="P38"><text:tab/></text:p>
      <text:p text:style-name="P34"><text:span text:style-name="Основной_20_шрифт_20_абзаца"><text:span text:style-name="T6"><text:tab/></text:span></text:span><text:span text:style-name="Основной_20_шрифт_20_абзаца"><text:span text:style-name="T11">Неструктурированные текстовые данные</text:span></text:span></text:p>
      <text:p text:style-name="P38"/>
      <text:p text:style-name="P38"><text:soft-page-break/><text:tab/>Текстовые описания фильмов содержат богатую семантическую информацию, которая не может быть полностью выражена через структурированные метаданные:</text:p>
      <text:p text:style-name="P34"><text:span text:style-name="Strong_20_Emphasis"><text:span text:style-name="T5"><text:tab/></text:span></text:span></text:p>
      <text:list text:style-name="L5">
        <text:list-item>
          <text:p text:style-name="P39"><text:span text:style-name="Strong_20_Emphasis"><text:span text:style-name="T5">Синопсис и сюжетное описание</text:span></text:span><text:span text:style-name="Основной_20_шрифт_20_абзаца"><text:span text:style-name="T6">. Краткое изложение сюжета содержит ключевые слова и смысловые паттерны, характеризующие тематику, настроение и стиль фильма. Современные методы обработки естественного языка, такие как TF-IDF и эмбеддинги на основе трансформеров (BERT, SBERT), позволяют извлекать из текстов описаний семантически насыщенные векторы признаков. Исследования демонстрируют, что использование глубоких текстовых признаков значительно повышает качество рекомендаций.</text:span></text:span></text:p>
        </text:list-item>
      </text:list>
      <text:p text:style-name="P40"><text:span text:style-name="Strong_20_Emphasis"><text:span text:style-name="T5"><text:tab/></text:span></text:span></text:p>
      <text:list text:continue-numbering="true" text:style-name="L5">
        <text:list-item>
          <text:p text:style-name="P39"><text:span text:style-name="Strong_20_Emphasis"><text:span text:style-name="T5">Отзывы критиков и пользователей</text:span></text:span><text:span text:style-name="Основной_20_шрифт_20_абзаца"><text:span text:style-name="T6">. Рецензии и комментарии содержат не только оценки, но и развёрнутые мнения о различных аспектах фильма: игре актёров, режиссёрских приёмах, визуальных эффектах, музыкальном сопровождении. Анализ тональности и тематическое моделирование отзывов позволяют извлекать дополнительную информацию о восприятии фильма аудиторией.</text:span></text:span></text:p>
        </text:list-item>
      </text:list>
      <text:p text:style-name="P40"><text:span text:style-name="Strong_20_Emphasis"><text:span text:style-name="T5"><text:tab/></text:span></text:span></text:p>
      <text:list text:continue-numbering="true" text:style-name="L5">
        <text:list-item>
          <text:p text:style-name="P39"><text:span text:style-name="Strong_20_Emphasis"><text:span text:style-name="T5">Ключевые слова и теги</text:span></text:span><text:span text:style-name="Основной_20_шрифт_20_абзаца"><text:span text:style-name="T6">. Многие базы данных (например, IMDb, TMDB) содержат наборы ключевых слов, характеризующих сюжетные повороты, темы, локации, персонажей и другие аспекты фильма. Эти теги создают дополнительное измерение для контентного анализа.</text:span></text:span></text:p>
        </text:list-item>
      </text:list>
      <text:p text:style-name="P41"><text:tab/></text:p>
      <text:p text:style-name="P41"/>
      <text:p text:style-name="P42">Визуальные данные</text:p>
      <text:p text:style-name="P38"><text:tab/></text:p>
      <text:p text:style-name="P38"><text:tab/>Современные исследования всё чаще обращаются к анализу визуального контента фильмов, который ранее оставался за рамками автоматических рекомендательных систем:</text:p>
      <text:p text:style-name="P34"><text:span text:style-name="Strong_20_Emphasis"><text:span text:style-name="T5"><text:tab/></text:span></text:span></text:p>
      <text:list text:style-name="L6">
        <text:list-item>
          <text:p text:style-name="P43"><text:span text:style-name="Strong_20_Emphasis"><text:span text:style-name="T5">Постеры и промо-материалы</text:span></text:span><text:span text:style-name="Основной_20_шрифт_20_абзаца"><text:span text:style-name="T6">. Постеры фильмов содержат визуальные коды, отражающие жанр, настроение и целевую аудиторию. Модели компьютерного зрения на основе свёрточных нейронных сетей (CNN), такие как VGG-16, ResNet-50, MobileNet, позволяют извлекать из постеров признаки, которые могут быть использованы для рекомендаций. Исследователи отмечают, что интеграция визуальных признаков из постеров с текстовыми признаками из описаний создаёт более полное представление о фильме и повышает точность рекомендаций.</text:span></text:span></text:p>
        </text:list-item>
      </text:list>
      <text:p text:style-name="P44"><text:span text:style-name="Strong_20_Emphasis"><text:span text:style-name="T5"><text:tab/></text:span></text:span></text:p>
      <text:list text:continue-numbering="true" text:style-name="L6">
        <text:list-item>
          <text:p text:style-name="P43"><text:span text:style-name="Strong_20_Emphasis"><text:span text:style-name="T5">Трейлеры и видеоряд</text:span></text:span><text:span text:style-name="Основной_20_шрифт_20_абзаца"><text:span text:style-name="T6">. Анализ видеоряда трейлеров или ключевых сцен позволяет извлекать информацию о визуальном стиле, динамике монтажа, цветовой гамме и других эстетических характеристиках фильма.</text:span></text:span></text:p>
        </text:list-item>
      </text:list>
      <text:p text:style-name="P44"><text:span text:style-name="Strong_20_Emphasis"><text:span text:style-name="T5"><text:tab/></text:span></text:span></text:p>
      <text:list text:continue-numbering="true" text:style-name="L6">
        <text:list-item>
          <text:p text:style-name="P43"><text:span text:style-name="Strong_20_Emphasis"><text:span text:style-name="T5">Кадры и сцены</text:span></text:span><text:span text:style-name="Основной_20_шрифт_20_абзаца"><text:span text:style-name="T6">. Технологии компьютерного зрения могут идентифицировать объекты, персонажей, локации и даже эмоциональную окраску отдельных сцен .</text:span></text:span></text:p>
        </text:list-item>
      </text:list>
      <text:p text:style-name="P38"><text:tab/></text:p>
      <text:p text:style-name="P34"><text:soft-page-break/><text:span text:style-name="Основной_20_шрифт_20_абзаца"><text:span text:style-name="T6"><text:tab/></text:span></text:span><text:span text:style-name="Основной_20_шрифт_20_абзаца"><text:span text:style-name="T11">Аудиоданные</text:span></text:span></text:p>
      <text:p text:style-name="P38"><text:tab/></text:p>
      <text:list text:style-name="L7">
        <text:list-item>
          <text:p text:style-name="P45">Звуковое сопровождение и музыка являются неотъемлемой частью кинематографического опыта. Современные исследования начинают учитывать и аудиальные характеристики:</text:p>
        </text:list-item>
      </text:list>
      <text:p text:style-name="P46"><text:span text:style-name="Strong_20_Emphasis"><text:span text:style-name="T5"><text:tab/></text:span></text:span></text:p>
      <text:list text:continue-numbering="true" text:style-name="L7">
        <text:list-item>
          <text:p text:style-name="P47"><text:span text:style-name="Strong_20_Emphasis"><text:span text:style-name="T5">Музыкальное сопровождение</text:span></text:span><text:span text:style-name="Основной_20_шрифт_20_абзаца"><text:span text:style-name="T6">. Анализ саундтрека, его жанровой принадлежности, интенсивности и эмоциональной окраски может служить дополнительным признаком для рекомендаций.</text:span></text:span></text:p>
        </text:list-item>
      </text:list>
      <text:p text:style-name="P46"><text:span text:style-name="Strong_20_Emphasis"><text:span text:style-name="T5"><text:tab/></text:span></text:span></text:p>
      <text:list text:continue-numbering="true" text:style-name="L7">
        <text:list-item>
          <text:p text:style-name="P47"><text:span text:style-name="Strong_20_Emphasis"><text:span text:style-name="T5">Звуковые эффекты</text:span></text:span><text:span text:style-name="Основной_20_шрифт_20_абзаца"><text:span text:style-name="T6">. Характер звукового оформления (например, наличие объёмного звука, специфические шумы) также может отражать жанровую принадлежность и производственный бюджет фильма.</text:span></text:span></text:p>
        </text:list-item>
      </text:list>
      <text:p text:style-name="P38"><text:tab/></text:p>
      <text:p text:style-name="P34"><text:span text:style-name="Основной_20_шрифт_20_абзаца"><text:span text:style-name="T6"><text:tab/></text:span></text:span><text:span text:style-name="Основной_20_шрифт_20_абзаца"><text:span text:style-name="T11">Источники данных о фильмах</text:span></text:span></text:p>
      <text:p text:style-name="P38"><text:tab/></text:p>
      <text:p text:style-name="P38"><text:tab/>Для построения рекомендательных систем необходимы качественные и репрезентативные данные. В области кинематографа существует несколько общедоступных источников, которые широко используются в исследовательских и коммерческих целях:</text:p>
      <text:p text:style-name="P34"><text:span text:style-name="Strong_20_Emphasis"><text:span text:style-name="T5"><text:tab/></text:span></text:span></text:p>
      <text:list text:style-name="L8">
        <text:list-item>
          <text:p text:style-name="P48"><text:span text:style-name="Strong_20_Emphasis"><text:span text:style-name="T5">MovieLens</text:span></text:span><text:span text:style-name="Основной_20_шрифт_20_абзаца"><text:span text:style-name="T6">. Наиболее популярный датасет в академических исследованиях, созданный и поддерживаемый GroupLens Research при Университете Миннесоты. Существует несколько версий датасета различного объёма: от 100 тысяч оценок (MovieLens 100K) до 20 миллионов оценок (MovieLens 20M) и более. Датасет содержит информацию о пользовательских оценках (по шкале от 0.5 до 5 звёзд с шагом 0.5), демографические данные пользователей (возраст, пол, род занятий), а также метаданные фильмов (название, жанры, год выпуска). Благодаря структурированности и полноте, MovieLens часто используется для обучения и сравнительного анализа алгоритмов рекомендаций.</text:span></text:span></text:p>
        </text:list-item>
      </text:list>
      <text:p text:style-name="P49"><text:span text:style-name="Strong_20_Emphasis"><text:span text:style-name="T5"><text:tab/></text:span></text:span></text:p>
      <text:list text:continue-numbering="true" text:style-name="L8">
        <text:list-item>
          <text:p text:style-name="P48"><text:span text:style-name="Strong_20_Emphasis"><text:span text:style-name="T5">IMDb (Internet Movie Databse)</text:span></text:span><text:span text:style-name="Основной_20_шрифт_20_абзаца"><text:span text:style-name="T6">. Один из крупнейших онлайн-ресурсов о кино, предоставляющий доступ к обширным наборам данных. Включает информацию о фильмах, съёмочных группах, актёрах, сюжетных линиях, рейтингах, отзывах и многом другом. Данные IMDb часто используются для обогащения других датасетов дополнительной информацией.</text:span></text:span></text:p>
        </text:list-item>
      </text:list>
      <text:p text:style-name="P49"><text:span text:style-name="Strong_20_Emphasis"><text:span text:style-name="T5"><text:tab/></text:span></text:span></text:p>
      <text:list text:continue-numbering="true" text:style-name="L8">
        <text:list-item>
          <text:p text:style-name="P48"><text:span text:style-name="Strong_20_Emphasis"><text:span text:style-name="T5">TMDB (The Movie Database)</text:span></text:span><text:span text:style-name="Основной_20_шрифт_20_абзаца"><text:span text:style-name="T6">. Открытая база данных о кино, предоставляющая бесплатный API для доступа к информации о фильмах, включая постеры, задники, описания, актёрский состав, съёмочную группу и пользовательские рейтинги. TMDB активно используется в современных исследованиях благодаря богатству метаданных и наличию визуального контента .</text:span></text:span></text:p>
        </text:list-item>
      </text:list>
      <text:p text:style-name="P49"><text:span text:style-name="Strong_20_Emphasis"><text:span text:style-name="T5"><text:s text:c="9"/></text:span></text:span></text:p>
      <text:list text:continue-numbering="true" text:style-name="L8">
        <text:list-item>
          <text:p text:style-name="P48"><text:span text:style-name="Strong_20_Emphasis"><text:span text:style-name="T5">Кинопоиск</text:span></text:span><text:span text:style-name="Основной_20_шрифт_20_абзаца"><text:span text:style-name="T6">. Крупнейший российский онлайн-кинотеатр и база данных о кино. Предоставляет ограниченный доступ к данным о фильмах и пользовательских оценках. Для отечественных исследовательских проектов может </text:span></text:span><text:soft-page-break/><text:span text:style-name="Основной_20_шрифт_20_абзаца"><text:span text:style-name="T6">служить ценным источником информации о предпочтениях русскоязычной аудитории.</text:span></text:span></text:p>
        </text:list-item>
      </text:list>
      <text:h text:style-name="P50" text:outline-level="3"/>
      <text:p text:style-name="Standard"><text:bookmark-start text:name="__RefHeading___Toc1376_6113702"/><text:span text:style-name="Основной_20_шрифт_20_абзаца"><text:span text:style-name="T6"><text:tab/></text:span></text:span><text:span text:style-name="Основной_20_шрифт_20_абзаца"><text:span text:style-name="T7">Особенности пользовательских предпочтений в сфере кино</text:span></text:span><text:bookmark-end text:name="__RefHeading___Toc1376_6113702"/></text:p>
      <text:p text:style-name="P51"><text:tab/>Понимание психологии и поведения зрителей является ключевым фактором для создания эффективных рекомендаций.</text:p>
      <text:p text:style-name="P52"><text:bookmark-start text:name="__RefHeading___Toc1378_6113702"/><text:tab/>Временная динамика предпочтений<text:bookmark-end text:name="__RefHeading___Toc1378_6113702"/></text:p>
      <text:p text:style-name="P51"><text:tab/>Интересы пользователя не статичны, они эволюционируют под влиянием различных факторов:</text:p>
      <text:list text:style-name="L9">
        <text:list-item>
          <text:p text:style-name="P53"><text:span text:style-name="Strong_20_Emphasis"><text:span text:style-name="T12">Возрастные изменения</text:span></text:span><text:span text:style-name="Основной_20_шрифт_20_абзаца"><text:span text:style-name="T7">. С возрастом предпочтения в кино могут существенно меняться: подростки чаще выбирают динамичные боевики и молодёжные комедии, взрослые зрители могут тяготеть к драмам и авторскому кино.</text:span></text:span></text:p>
        </text:list-item>
        <text:list-item>
          <text:p text:style-name="P53"><text:span text:style-name="Strong_20_Emphasis"><text:span text:style-name="T12">Сезонные колебания</text:span></text:span><text:span text:style-name="Основной_20_шрифт_20_абзаца"><text:span text:style-name="T7">. В разные сезоны года предпочтения могут смещаться: летом популярны лёгкие комедии и приключенческие фильмы, зимой — романтические истории и семейное кино.</text:span></text:span></text:p>
        </text:list-item>
        <text:list-item>
          <text:p text:style-name="P53"><text:span text:style-name="Strong_20_Emphasis"><text:span text:style-name="T12">Изменение моды и трендов</text:span></text:span><text:span text:style-name="Основной_20_шрифт_20_абзаца"><text:span text:style-name="T7">. Выход нашумевшего блокбастера или получение фильмом престижной награды («Оскар», «Золотая пальмовая ветвь») может временно повысить интерес к определённому жанру, режиссёру или актёру .</text:span></text:span></text:p>
        </text:list-item>
        <text:list-item>
          <text:p text:style-name="P53"><text:span text:style-name="Strong_20_Emphasis"><text:span text:style-name="T12">Настроение и эмоциональное состояние</text:span></text:span><text:span text:style-name="Основной_20_шрифт_20_абзаца"><text:span text:style-name="T7">. Выбор фильма часто диктуется текущим эмоциональным состоянием: в одном случае пользователь хочет получить порцию адреналина от напряжённого триллера, в другом — расслабиться за лёгкой комедией, в третьем — погрузиться в глубокую драму. Учёт эмоционального контекста является одним из перспективных направлений исследований .</text:span></text:span></text:p>
        </text:list-item>
      </text:list>
      <text:p text:style-name="P52"><text:bookmark-start text:name="__RefHeading___Toc1380_6113702"/><text:tab/>Контекстные факторы<text:bookmark-end text:name="__RefHeading___Toc1380_6113702"/></text:p>
      <text:p text:style-name="P51"><text:tab/>На выбор фильма влияют не только устойчивые предпочтения, но и ситуационные факторы:</text:p>
      <text:list text:style-name="L10">
        <text:list-item>
          <text:p text:style-name="P54"><text:span text:style-name="Strong_20_Emphasis"><text:span text:style-name="T12">Время суток</text:span></text:span><text:span text:style-name="Основной_20_шрифт_20_абзаца"><text:span text:style-name="T7">. Вечерний просмотр может отличаться от дневного: вечером пользователи чаще выбирают полнометражные фильмы, днём — сериалы или короткие программы.</text:span></text:span></text:p>
        </text:list-item>
        <text:list-item>
          <text:p text:style-name="P54"><text:span text:style-name="Strong_20_Emphasis"><text:span text:style-name="T12">День недели</text:span></text:span><text:span text:style-name="Основной_20_шрифт_20_абзаца"><text:span text:style-name="T7">. В будни зрители могут отдавать предпочтение коротким сериалам, в выходные — полнометражному кино.</text:span></text:span></text:p>
        </text:list-item>
        <text:list-item>
          <text:p text:style-name="P54"><text:span text:style-name="Strong_20_Emphasis"><text:span text:style-name="T12">Компания</text:span></text:span><text:span text:style-name="Основной_20_шрифт_20_абзаца"><text:span text:style-name="T7">. Просмотр в одиночестве, с семьёй или с друзьями существенно влияет на выбор контента: семейные просмотры требуют контента, подходящего для всех возрастов, а просмотр с друзьями может быть ориентирован на комедийные или зрелищные фильмы.</text:span></text:span></text:p>
        </text:list-item>
        <text:list-item>
          <text:p text:style-name="P54"><text:soft-page-break/><text:span text:style-name="Strong_20_Emphasis"><text:span text:style-name="T12">Устройство просмотра</text:span></text:span><text:span text:style-name="Основной_20_шрифт_20_абзаца"><text:span text:style-name="T7">. Контент, выбираемый для просмотра на большом телевизионном экране, может отличаться от того, что смотрят на смартфоне в транспорте.</text:span></text:span></text:p>
        </text:list-item>
      </text:list>
      <text:p text:style-name="P52"><text:bookmark-start text:name="__RefHeading___Toc1382_6113702"/><text:tab/>Социальный контекст<text:bookmark-end text:name="__RefHeading___Toc1382_6113702"/></text:p>
      <text:p text:style-name="P51"><text:tab/>Влияние социального окружения на выбор фильмов остаётся значимым, несмотря на развитие автоматических рекомендаций:</text:p>
      <text:list text:style-name="L11">
        <text:list-item>
          <text:p text:style-name="P55"><text:span text:style-name="Strong_20_Emphasis"><text:span text:style-name="T12">Рекомендации друзей и знакомых</text:span></text:span><text:span text:style-name="Основной_20_шрифт_20_абзаца"><text:span text:style-name="T7">. Многие зрители доверяют советам близких людей больше, чем алгоритмическим рекомендациям.</text:span></text:span></text:p>
        </text:list-item>
        <text:list-item>
          <text:p text:style-name="P55"><text:span text:style-name="Strong_20_Emphasis"><text:span text:style-name="T12">Обсуждения в социальных сетях</text:span></text:span><text:span text:style-name="Основной_20_шрифт_20_абзаца"><text:span text:style-name="T7">. Популярность фильма в социальных медиа, количество и тональность обсуждений могут стимулировать интерес к просмотру.</text:span></text:span></text:p>
        </text:list-item>
        <text:list-item>
          <text:p text:style-name="P55"><text:span text:style-name="Strong_20_Emphasis"><text:span text:style-name="T12">Культурные события</text:span></text:span><text:span text:style-name="Основной_20_шрифт_20_абзаца"><text:span text:style-name="T7">. Выход фильма, приуроченный к знаменательной дате, или участие картины в престижном кинофестивале повышают её привлекательность.</text:span></text:span></text:p>
        </text:list-item>
      </text:list>
      <text:p text:style-name="P52"><text:bookmark-start text:name="__RefHeading___Toc1384_6113702"/><text:tab/>Проблема «пузыря фильтров» и необходимость разнообразия<text:bookmark-end text:name="__RefHeading___Toc1384_6113702"/></text:p>
      <text:p text:style-name="P51"><text:tab/>Длительное использование персонализированных рекомендаций может привести к эффекту «пузыря фильтров» (filter bubble), когда пользователь получает контент, всё более сужающий его кругозор и замыкающий его в рамках уже известных предпочтений. В контексте фильмов это проявляется в рекомендациях, слишком похожих на уже просмотренные, что снижает разнообразие кинематографического опыта .</text:p>
      <text:p text:style-name="P51">Современные рекомендательные системы стремятся балансировать между точностью и разнообразием (diversity), а также внедрять механизмы «серендипности» (serendipity) — способности предлагать неожиданные, но приятные для пользователя рекомендации, которые он не смог бы найти самостоятельно . Как отмечают эксперты, «искусственный интеллект старается выдавать не просто 'усредненный' контент, похожий на все фильмы или сериалы, которые пользователь смотрел ранее, а показывать контент из разных кластеров», что позволяет формировать более разнообразную и интересную витрину.</text:p>
      <text:h text:style-name="P33" text:outline-level="2"><text:bookmark-start text:name="__RefHeading___Toc1386_6113702"/><text:span text:style-name="Основной_20_шрифт_20_абзаца"><text:span text:style-name="T12"><text:tab/></text:span></text:span><text:span text:style-name="Основной_20_шрифт_20_абзаца"><text:span text:style-name="T7">1.4 Математические модели и алгоритмы, используемые в рекомендательных системах</text:span></text:span><text:bookmark-end text:name="__RefHeading___Toc1386_6113702"/></text:h>
      <text:p text:style-name="P56"/>
      <text:p text:style-name="P57"><text:tab/>В основе любой рекомендательной системы лежат математические методы и алгоритмы, которые преобразуют исходные данные (оценки пользователей, атрибуты объектов) в персонализированные рекомендации. Выбор конкретного алгоритма зависит от множества факторов: характера доступных данных, требуемой точности, ограничений по вычислительным ресурсам, необходимости интерпретируемости результатов. В данном параграфе рассматриваются основные классы математических моделей и алгоритмов, применяемых при построении <text:soft-page-break/>рекомендательных систем для фильмов, с акцентом на их теоретическое обоснование и практическую реализацию.</text:p>
      <text:p text:style-name="Standard"><text:span text:style-name="Основной_20_шрифт_20_абзаца"><text:span text:style-name="T7"><text:tab/></text:span></text:span><text:span text:style-name="Основной_20_шрифт_20_абзаца"><text:span text:style-name="T13">Матричная факторизация и метод SVD</text:span></text:span></text:p>
      <text:p text:style-name="P52"/>
      <text:p text:style-name="Standard"><text:span text:style-name="Основной_20_шрифт_20_абзаца"><text:span text:style-name="T7"><text:tab/>Матричная факторизация (Matrix Factorization) является одним из наиболее успешных и широко применяемых методов коллаборативной фильтрации, особенно после триумфа на конкурсе Netflix Prize в 2006–2009 годах. Основная идея заключается в предположении, что предпочтения пользователя и свойства объекта могут быть описаны небольшим набором </text:span></text:span><text:span text:style-name="Strong_20_Emphasis"><text:span text:style-name="T12">скрытых факторов (latent factors)</text:span></text:span><text:span text:style-name="Основной_20_шрифт_20_абзаца"><text:span text:style-name="T7">.</text:span></text:span></text:p>
      <text:p text:style-name="P52"/>
      <text:p text:style-name="P52"><text:tab/>Пусть имеется матрица оценок R размерностью ∣U∣×∣I∣, где U – множество пользователей, I – множество объектов (фильмов). Элемент rui​ соответствует оценке, которую пользователь u поставил фильму i. Матрица R является крайне разреженной, так как каждый пользователь оценивает лишь малую долю от общего числа фильмов.</text:p>
      <text:p text:style-name="P52">Метод матричной факторизации заключается в приближении исходной матрицы R произведением двух низкоранговых матриц</text:p>
      <text:p text:style-name="P52"><text:tab/></text:p>
      <text:p text:style-name="P52"><text:s/><text:tab/>Базовая модель SVD</text:p>
      <text:p text:style-name="P52"/>
      <text:p text:style-name="Standard"><text:span text:style-name="Основной_20_шрифт_20_абзаца"><text:span text:style-name="T7"><text:tab/>В классической реализации SVD (Singular Value Decomposition) для рекомендательных систем, часто называемой </text:span></text:span><text:span text:style-name="Strong_20_Emphasis"><text:span text:style-name="T12">Funk SVD</text:span></text:span><text:span text:style-name="Основной_20_шрифт_20_абзаца"><text:span text:style-name="T7"> (по имени Саймона Фанка, предложившего эту идею), задача формулируется как оптимизационная: необходимо найти такие матрицы P и Q, чтобы минимизировать ошибку предсказания на известных оценках.</text:span></text:span></text:p>
      <text:p text:style-name="Text_20_body"><text:span text:style-name="Основной_20_шрифт_20_абзаца"><text:span text:style-name="T7">Однако базовая модель не учитывает систематические смещения: некоторые пользователи склонны ставить более высокие оценки, чем другие, а некоторые фильмы в среднем оцениваются выше из-за своей популярности или качества. Поэтому в модель добавляют </text:span></text:span><text:span text:style-name="Strong_20_Emphasis"><text:span text:style-name="T12">смещения (biases)</text:span></text:span></text:p>
      <text:p text:style-name="Text_20_body"><text:span text:style-name="Strong_20_Emphasis"><text:span text:style-name="T12"><text:tab/>Алгоритмы на основе ближайших соседей (kNN)</text:span></text:span></text:p>
      <text:p text:style-name="Text_20_body"><text:span text:style-name="Strong_20_Emphasis"><text:span text:style-name="T12"><text:tab/>Методы k-ближайших соседей (k-Nearest Neighbors, kNN) относятся к классу memory-based алгоритмов и являются одними из наиболее интуитивно понятных подходов к построению рекомендаций. Основная идея заключается в поиске похожих объектов или пользователей и использовании их оценок для формирования предсказания.</text:span></text:span></text:p>
      <text:p text:style-name="P51">Несмотря на почтенный возраст (метод был предложен ещё в 1951 году), kNN продолжает активно использоваться в рекомендательных системах благодаря своей простоте, интерпретируемости и эффективности на определённых типах данных. В контексте рекомендаций фильмов применяются две основные разновидности: user-based kNN и item-based kNN.</text:p>
      <text:p text:style-name="P51"><text:soft-page-break/><text:tab/>Нейросетевые подходы и глубокое обучение</text:p>
      <text:p text:style-name="P51"><text:tab/>Нейроколлаборативная фильтрация заменяет скалярное произведение в матричной факторизации на нейронную сеть, способную моделировать более сложные нелинейные взаимодействия между пользователями и объектами.</text:p>
      <text:p text:style-name="P51">Векторы пользователей и фильмов подаются на вход многослойному перцептрону, который обучается предсказывать оценку</text:p>
      <text:p text:style-name="P52"><text:tab/>Методы обработки естественного языка для контентной фильтрации</text:p>
      <text:p text:style-name="P52"><text:tab/></text:p>
      <text:p text:style-name="P52"><text:tab/>Контентная фильтрация требует преобразования текстовых описаний фильмов (названий, синопсисов, сюжетов) в числовые векторы, с которыми могут работать алгоритмы машинного обучения. Для этого применяются различные методы векторизации текста.</text:p>
      <text:p text:style-name="P52"/>
      <text:p text:style-name="P52"><text:tab/> TF-IDF (Term Frequency – Inverse Document Frequency)</text:p>
      <text:p text:style-name="P52"><text:tab/></text:p>
      <text:p text:style-name="P52"><text:tab/>TF-IDF является классическим методом преобразования текста в векторную форму, широко применяемым в рекомендательных системах. Метод основан на статистическом анализе частот слов в документах и коллекции в целом.</text:p>
      <text:p text:style-name="Standard"><text:span text:style-name="Strong_20_Emphasis"><text:span text:style-name="T12"><text:tab/></text:span></text:span></text:p>
      <text:p text:style-name="Standard"><text:span text:style-name="Strong_20_Emphasis"><text:span text:style-name="T12"><text:tab/>TF (Term Frequency)</text:span></text:span><text:span text:style-name="Основной_20_шрифт_20_абзаца"><text:span text:style-name="T7"> – частота термина в документе. Отражает, насколько важно слово для конкретного документа:</text:span></text:span></text:p>
      <text:p text:style-name="Standard"><text:span text:style-name="Strong_20_Emphasis"><text:span text:style-name="T12"><text:tab/></text:span></text:span></text:p>
      <text:p text:style-name="Standard"><text:span text:style-name="Strong_20_Emphasis"><text:span text:style-name="T12"><text:tab/>IDF (Inverse Document Frequency)</text:span></text:span><text:span text:style-name="Основной_20_шрифт_20_абзаца"><text:span text:style-name="T7"> – обратная частота документа. Отражает, насколько редким является слово во всей коллекции</text:span></text:span></text:p>
      <text:p text:style-name="P52"/>
      <text:p text:style-name="P52"/>
      <text:p text:style-name="P58">Сравнительный анализ и выбор алгоритмов</text:p>
      <text:p text:style-name="P58"/>
      <table:table table:name="Таблица1" table:style-name="Таблица1">
        <table:table-column table:style-name="Таблица1.A" table:number-columns-repeated="2"/>
        <table:table-column table:style-name="Таблица1.C" table:number-columns-repeated="4"/>
        <table:table-row>
          <table:table-cell table:style-name="Таблица1.A1" office:value-type="string">
            <text:p text:style-name="P59">Алгоритм</text:p>
          </table:table-cell>
          <table:table-cell table:style-name="Таблица1.A1" office:value-type="string">
            <text:p text:style-name="P59">Точность</text:p>
          </table:table-cell>
          <table:table-cell table:style-name="Таблица1.A1" office:value-type="string">
            <text:p text:style-name="P59">Скорость работы</text:p>
          </table:table-cell>
          <table:table-cell table:style-name="Таблица1.A1" office:value-type="string">
            <text:p text:style-name="P59">Масштабируемость</text:p>
          </table:table-cell>
          <table:table-cell table:style-name="Таблица1.A1" office:value-type="string">
            <text:p text:style-name="P59">Устойчивость к разряженности</text:p>
          </table:table-cell>
          <table:table-cell table:style-name="Таблица1.F1" office:value-type="string">
            <text:p text:style-name="P59">Интерпретируемость</text:p>
          </table:table-cell>
        </table:table-row>
        <table:table-row>
          <table:table-cell table:style-name="Таблица1.A2" office:value-type="string">
            <text:p text:style-name="P59">SVD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A2" office:value-type="string">
            <text:p text:style-name="P59">Высокая (после обучения)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F2" office:value-type="string">
            <text:p text:style-name="P59">Низкая</text:p>
          </table:table-cell>
        </table:table-row>
        <table:table-row table:style-name="Таблица1.3">
          <table:table-cell table:style-name="Таблица1.A2" office:value-type="string">
            <text:p text:style-name="P59">kNN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A2" office:value-type="string">
            <text:p text:style-name="P59">Низкая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F2" office:value-type="string">
            <text:p text:style-name="P59">Высокая</text:p>
          </table:table-cell>
        </table:table-row>
        <table:table-row>
          <table:table-cell table:style-name="Таблица1.A2" office:value-type="string">
            <text:p text:style-name="P59">TF-IDF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A2" office:value-type="string">
            <text:p text:style-name="P59">Не зависит от разряженности</text:p>
          </table:table-cell>
          <table:table-cell table:style-name="Таблица1.F2" office:value-type="string">
            <text:p text:style-name="P59">Высокая</text:p>
          </table:table-cell>
        </table:table-row>
        <table:table-row>
          <table:table-cell table:style-name="Таблица1.A2" office:value-type="string">
            <text:p text:style-name="P59">Нейросетевые модели</text:p>
          </table:table-cell>
          <table:table-cell table:style-name="Таблица1.A2" office:value-type="string">
            <text:p text:style-name="P59">Очень высокая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A2" office:value-type="string">
            <text:p text:style-name="P59">Средняя</text:p>
          </table:table-cell>
          <table:table-cell table:style-name="Таблица1.A2" office:value-type="string">
            <text:p text:style-name="P59">Высокая</text:p>
          </table:table-cell>
          <table:table-cell table:style-name="Таблица1.F2" office:value-type="string">
            <text:p text:style-name="P59">Очень низкая</text:p>
          </table:table-cell>
        </table:table-row>
      </table:table>
      <text:h text:style-name="Heading_20_1" text:outline-level="1"><text:bookmark-start text:name="__RefHeading___Toc5093_2666258103"/><text:soft-page-break/>РАЗДЕЛ 2. ПРАКТИЧЕСКАЯ ЧАСТЬ<text:bookmark-end text:name="__RefHeading___Toc5093_2666258103"/></text:h>
      <text:h text:style-name="P60" text:outline-level="2"><text:bookmark-start text:name="__RefHeading___Toc3811_2666258103"/>2.1<text:tab/>Архитектура и технологический стек веб-сервиса<text:bookmark-end text:name="__RefHeading___Toc3811_2666258103"/></text:h>
      <text:p text:style-name="Text_20_body"/>
      <text:p text:style-name="P61">Разработка веб-сервиса «Serendipity Cinema» осуществлялась с использованием клиент-серверной архитектуры, которая является стандартом для современных веб-приложений. Такой подход обеспечивает разделение системы на независимые компоненты, что упрощает разработку, тестирование и дальнейшее масштабирование.</text:p>
      <text:p text:style-name="P61">Архитектура включает три основных уровня: клиентский (frontend), серверный (backend) и уровень хранения данных (database). Клиентская часть отвечает за взаимодействие с пользователем и отображение информации, серверная — за обработку запросов, реализацию бизнес-логики и алгоритмов рекомендаций, а база данных обеспечивает хранение и управление данными.</text:p>
      <text:p text:style-name="P61">Выбор технологического стека осуществлялся с учётом требований к производительности, гибкости и скорости разработки. В качестве основного языка программирования был выбран Python, который обладает высокой читаемостью кода, развитой экосистемой и большим количеством библиотек для работы с данными.</text:p>
      <text:p text:style-name="P61"/>
      <text:p text:style-name="P62">Таблица 2.1 — Технологический стек проекта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63">Компонент</text:p>
          </table:table-cell>
          <table:table-cell table:style-name="Таблица2.A1" office:value-type="string">
            <text:p text:style-name="P63">Технология</text:p>
          </table:table-cell>
          <table:table-cell table:style-name="Таблица2.A1" office:value-type="string">
            <text:p text:style-name="P63">Назначение</text:p>
          </table:table-cell>
        </table:table-row>
        <table:table-row>
          <table:table-cell table:style-name="Таблица2.A1" office:value-type="string">
            <text:p text:style-name="P62">Backend</text:p>
          </table:table-cell>
          <table:table-cell table:style-name="Таблица2.A1" office:value-type="string">
            <text:p text:style-name="P62">Python 3.11</text:p>
          </table:table-cell>
          <table:table-cell table:style-name="Таблица2.A1" office:value-type="string">
            <text:p text:style-name="P62">Основной язык разработки</text:p>
          </table:table-cell>
        </table:table-row>
        <table:table-row>
          <table:table-cell table:style-name="Таблица2.A1" office:value-type="string">
            <text:p text:style-name="P62">Backend</text:p>
          </table:table-cell>
          <table:table-cell table:style-name="Таблица2.A1" office:value-type="string">
            <text:p text:style-name="P62">Django</text:p>
          </table:table-cell>
          <table:table-cell table:style-name="Таблица2.A1" office:value-type="string">
            <text:p text:style-name="P62">Веб-фреймворк</text:p>
          </table:table-cell>
        </table:table-row>
        <table:table-row>
          <table:table-cell table:style-name="Таблица2.A1" office:value-type="string">
            <text:p text:style-name="P62">Frontend</text:p>
          </table:table-cell>
          <table:table-cell table:style-name="Таблица2.A1" office:value-type="string">
            <text:p text:style-name="P62">HTML5</text:p>
          </table:table-cell>
          <table:table-cell table:style-name="Таблица2.A1" office:value-type="string">
            <text:p text:style-name="P62">Разметка страниц</text:p>
          </table:table-cell>
        </table:table-row>
        <table:table-row>
          <table:table-cell table:style-name="Таблица2.A1" office:value-type="string">
            <text:p text:style-name="P62">Frontend</text:p>
          </table:table-cell>
          <table:table-cell table:style-name="Таблица2.A1" office:value-type="string">
            <text:p text:style-name="P62">CSS3</text:p>
          </table:table-cell>
          <table:table-cell table:style-name="Таблица2.A1" office:value-type="string">
            <text:p text:style-name="P62">Стилизация интерфейса</text:p>
          </table:table-cell>
        </table:table-row>
        <table:table-row>
          <table:table-cell table:style-name="Таблица2.A1" office:value-type="string">
            <text:p text:style-name="P62">Frontend</text:p>
          </table:table-cell>
          <table:table-cell table:style-name="Таблица2.A1" office:value-type="string">
            <text:p text:style-name="P62">JavaScript</text:p>
          </table:table-cell>
          <table:table-cell table:style-name="Таблица2.A1" office:value-type="string">
            <text:p text:style-name="P62">Логика интерфейса</text:p>
          </table:table-cell>
        </table:table-row>
        <table:table-row>
          <table:table-cell table:style-name="Таблица2.A1" office:value-type="string">
            <text:p text:style-name="P62">Database</text:p>
          </table:table-cell>
          <table:table-cell table:style-name="Таблица2.A1" office:value-type="string">
            <text:p text:style-name="P62">SQLite</text:p>
          </table:table-cell>
          <table:table-cell table:style-name="Таблица2.A1" office:value-type="string">
            <text:p text:style-name="P62">Хранение данных (разработка)</text:p>
          </table:table-cell>
        </table:table-row>
        <table:table-row>
          <table:table-cell table:style-name="Таблица2.A1" office:value-type="string">
            <text:p text:style-name="P62">Database</text:p>
          </table:table-cell>
          <table:table-cell table:style-name="Таблица2.A1" office:value-type="string">
            <text:p text:style-name="P62">PostgreSQL</text:p>
          </table:table-cell>
          <table:table-cell table:style-name="Таблица2.A1" office:value-type="string">
            <text:p text:style-name="P62">Масштабирование (продакшн)</text:p>
          </table:table-cell>
        </table:table-row>
        <table:table-row>
          <table:table-cell table:style-name="Таблица2.A1" office:value-type="string">
            <text:p text:style-name="P62">API</text:p>
          </table:table-cell>
          <table:table-cell table:style-name="Таблица2.A1" office:value-type="string">
            <text:p text:style-name="P62">TMDB API</text:p>
          </table:table-cell>
          <table:table-cell table:style-name="Таблица2.A1" office:value-type="string">
            <text:p text:style-name="P62">Данные о фильмах</text:p>
          </table:table-cell>
        </table:table-row>
        <table:table-row>
          <table:table-cell table:style-name="Таблица2.A1" office:value-type="string">
            <text:p text:style-name="P62">API</text:p>
          </table:table-cell>
          <table:table-cell table:style-name="Таблица2.A1" office:value-type="string">
            <text:p text:style-name="P62">OMDb API</text:p>
          </table:table-cell>
          <table:table-cell table:style-name="Таблица2.A1" office:value-type="string">
            <text:p text:style-name="P62">Резервный источник</text:p>
          </table:table-cell>
        </table:table-row>
      </table:table>
      <text:p text:style-name="P61"/>
      <text:p text:style-name="P62"><text:tab/>Использование Django в качестве серверного фреймворка позволило значительно ускорить процесс разработки за счёт встроенных механизмов, таких <text:soft-page-break/>как ORM, маршрутизация URL, система аутентификации и административная панель.</text:p>
      <text:p text:style-name="P62"/>
      <text:p text:style-name="P62">С точки зрения взаимодействия компонентов, система функционирует следующим образом. Пользователь через браузер отправляет запрос на сервер (например, запрос рекомендаций). Сервер принимает этот запрос, обрабатывает его, при необходимости обращается к базе данных или внешним API, после чего формирует ответ и отправляет его обратно клиенту. Клиентская часть, в свою очередь, отображает полученные данные в удобном для пользователя виде.</text:p>
      <text:p text:style-name="P62"/>
      <text:p text:style-name="P64">Принцип работы системы:</text:p>
      <text:p text:style-name="P61">При запуске веб-сервиса пользователь попадает на главную страницу, где ему предлагается настроить параметры рекомендаций. Система запрашивает минимальное количество оценок (обычно 5-10 фильмов) для формирования первоначального профиля предпочтений. После этого алгоритм генерирует персонализированный список рекомендаций, который отображается в виде карточек фильмов с постерами, названиями, жанрами и кратким описанием.</text:p>
      <text:p text:style-name="P65"><text:span text:style-name="Основной_20_шрифт_20_абзаца"><text:span text:style-name="T7">Пользователь может просматривать рекомендации, переходить на страницу детальной информации о фильме, ставить оценки. Каждая новая оценка учитывается системой и влияет на последующие рекомендации, обеспечивая адаптацию к изменяющимся предпочтениям пользователя.</text:span></text:span> <text:span text:style-name="Основной_20_шрифт_20_абзаца"><text:span text:style-name="T7">Таким образом, выбранная архитектура обеспечивает баланс между простотой реализации и возможностью дальнейшего масштабирования системы.</text:span></text:span></text:p>
      <text:p text:style-name="P61"/>
      <text:h text:style-name="P60" text:outline-level="2"><text:bookmark-start text:name="__RefHeading___Toc3813_2666258103"/>2.2<text:tab/>Проектирование базы данных<text:bookmark-end text:name="__RefHeading___Toc3813_2666258103"/></text:h>
      <text:p text:style-name="P66"/>
      <text:p text:style-name="P66">Проектирование базы данных является одним из наиболее важных этапов разработки, поскольку от качества структуры данных напрямую зависит производительность и корректность работы всей системы. В рамках данного проекта была выбрана реляционная модель данных, так как она обеспечивает строгую структуру, поддержку связей и возможность эффективного выполнения сложных запросов.</text:p>
      <text:p text:style-name="P66"/>
      <text:p text:style-name="P67"><text:span text:style-name="Основной_20_шрифт_20_абзаца"><text:span text:style-name="T7">При проектировании использовались принципы нормализации, в частности приведение структуры к третьей нормальной форме (3НФ). Это означает, что каждая таблица содержит данные, относящиеся только к одной сущности, а все неключевые атрибуты функционально зависят от первичного ключа. Такой подход позволяет избежать избыточности данных и минимизировать вероятность возникновения логических ошибок.</text:span></text:span><text:span text:style-name="Основной_20_шрифт_20_абзаца"><text:span text:style-name="T13"> </text:span></text:span></text:p>
      <text:p text:style-name="P68"><text:soft-page-break/>Таблица 2.2 — Структура таблицы User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3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3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3.A1" office:value-type="string">
            <text:p text:style-name="Text_20_body">id</text:p>
          </table:table-cell>
          <table:table-cell table:style-name="Таблица3.A1" office:value-type="string">
            <text:p text:style-name="Text_20_body">Integer (PK)</text:p>
          </table:table-cell>
          <table:table-cell table:style-name="Таблица3.A1" office:value-type="string">
            <text:p text:style-name="Text_20_body">Уникальный идентификатор пользователя</text:p>
          </table:table-cell>
        </table:table-row>
        <table:table-row>
          <table:table-cell table:style-name="Таблица3.A1" office:value-type="string">
            <text:p text:style-name="Text_20_body">username</text:p>
          </table:table-cell>
          <table:table-cell table:style-name="Таблица3.A1" office:value-type="string">
            <text:p text:style-name="Text_20_body">Varchar(150)</text:p>
          </table:table-cell>
          <table:table-cell table:style-name="Таблица3.A1" office:value-type="string">
            <text:p text:style-name="Text_20_body">Логин</text:p>
          </table:table-cell>
        </table:table-row>
        <table:table-row>
          <table:table-cell table:style-name="Таблица3.A1" office:value-type="string">
            <text:p text:style-name="Text_20_body">email</text:p>
          </table:table-cell>
          <table:table-cell table:style-name="Таблица3.A1" office:value-type="string">
            <text:p text:style-name="Text_20_body">Varchar(255)</text:p>
          </table:table-cell>
          <table:table-cell table:style-name="Таблица3.A1" office:value-type="string">
            <text:p text:style-name="Text_20_body">Электронная почта</text:p>
          </table:table-cell>
        </table:table-row>
        <table:table-row>
          <table:table-cell table:style-name="Таблица3.A1" office:value-type="string">
            <text:p text:style-name="Text_20_body">password</text:p>
          </table:table-cell>
          <table:table-cell table:style-name="Таблица3.A1" office:value-type="string">
            <text:p text:style-name="Text_20_body">Varchar</text:p>
          </table:table-cell>
          <table:table-cell table:style-name="Таблица3.A1" office:value-type="string">
            <text:p text:style-name="Text_20_body">Хешированный пароль</text:p>
          </table:table-cell>
        </table:table-row>
        <table:table-row>
          <table:table-cell table:style-name="Таблица3.A1" office:value-type="string">
            <text:p text:style-name="Text_20_body">date_joined</text:p>
          </table:table-cell>
          <table:table-cell table:style-name="Таблица3.A1" office:value-type="string">
            <text:p text:style-name="Text_20_body">Datetime</text:p>
          </table:table-cell>
          <table:table-cell table:style-name="Таблица3.A1" office:value-type="string">
            <text:p text:style-name="Text_20_body">Дата регистрации</text:p>
          </table:table-cell>
        </table:table-row>
      </table:table>
      <text:p text:style-name="P68"><text:line-break/>Таблица 2.3 — Структура таблицы Film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4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4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4.A1" office:value-type="string">
            <text:p text:style-name="Text_20_body">id</text:p>
          </table:table-cell>
          <table:table-cell table:style-name="Таблица4.A1" office:value-type="string">
            <text:p text:style-name="Text_20_body">Integer (PK)</text:p>
          </table:table-cell>
          <table:table-cell table:style-name="Таблица4.A1" office:value-type="string">
            <text:p text:style-name="Text_20_body">Уникальный идентификатор фильма</text:p>
          </table:table-cell>
        </table:table-row>
        <table:table-row>
          <table:table-cell table:style-name="Таблица4.A1" office:value-type="string">
            <text:p text:style-name="Text_20_body">title</text:p>
          </table:table-cell>
          <table:table-cell table:style-name="Таблица4.A1" office:value-type="string">
            <text:p text:style-name="Text_20_body">Varchar(200)</text:p>
          </table:table-cell>
          <table:table-cell table:style-name="Таблица4.A1" office:value-type="string">
            <text:p text:style-name="Text_20_body">Название фильма</text:p>
          </table:table-cell>
        </table:table-row>
        <table:table-row>
          <table:table-cell table:style-name="Таблица4.A1" office:value-type="string">
            <text:p text:style-name="Text_20_body">description</text:p>
          </table:table-cell>
          <table:table-cell table:style-name="Таблица4.A1" office:value-type="string">
            <text:p text:style-name="Text_20_body">Text</text:p>
          </table:table-cell>
          <table:table-cell table:style-name="Таблица4.A1" office:value-type="string">
            <text:p text:style-name="Text_20_body">Краткое описание</text:p>
          </table:table-cell>
        </table:table-row>
        <table:table-row>
          <table:table-cell table:style-name="Таблица4.A1" office:value-type="string">
            <text:p text:style-name="Text_20_body">genres</text:p>
          </table:table-cell>
          <table:table-cell table:style-name="Таблица4.A1" office:value-type="string">
            <text:p text:style-name="Text_20_body">Varchar(255)</text:p>
          </table:table-cell>
          <table:table-cell table:style-name="Таблица4.A1" office:value-type="string">
            <text:p text:style-name="Text_20_body">Жанровая принадлежность</text:p>
          </table:table-cell>
        </table:table-row>
        <table:table-row>
          <table:table-cell table:style-name="Таблица4.A1" office:value-type="string">
            <text:p text:style-name="Text_20_body">year</text:p>
          </table:table-cell>
          <table:table-cell table:style-name="Таблица4.A1" office:value-type="string">
            <text:p text:style-name="Text_20_body">Integer</text:p>
          </table:table-cell>
          <table:table-cell table:style-name="Таблица4.A1" office:value-type="string">
            <text:p text:style-name="Text_20_body">Год выпуска</text:p>
          </table:table-cell>
        </table:table-row>
        <table:table-row>
          <table:table-cell table:style-name="Таблица4.A1" office:value-type="string">
            <text:p text:style-name="Text_20_body">poster_url</text:p>
          </table:table-cell>
          <table:table-cell table:style-name="Таблица4.A1" office:value-type="string">
            <text:p text:style-name="Text_20_body">Text</text:p>
          </table:table-cell>
          <table:table-cell table:style-name="Таблица4.A1" office:value-type="string">
            <text:p text:style-name="Text_20_body">Ссылка на изображение</text:p>
          </table:table-cell>
        </table:table-row>
        <table:table-row>
          <table:table-cell table:style-name="Таблица4.A1" office:value-type="string">
            <text:p text:style-name="Text_20_body">tmdb_id</text:p>
          </table:table-cell>
          <table:table-cell table:style-name="Таблица4.A1" office:value-type="string">
            <text:p text:style-name="Text_20_body">Integer</text:p>
          </table:table-cell>
          <table:table-cell table:style-name="Таблица4.A1" office:value-type="string">
            <text:p text:style-name="Text_20_body">Внешний идентификатор</text:p>
          </table:table-cell>
        </table:table-row>
      </table:table>
      <text:p text:style-name="P68"/>
      <text:p text:style-name="P68">Таблица 2.4 — Структура таблицы Ratin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ext_20_body"><text:span text:style-name="Основной_20_шрифт_20_абзаца"><text:span text:style-name="T14">Поле</text:span></text:span></text:p>
          </table:table-cell>
          <table:table-cell table:style-name="Таблица5.A1" office:value-type="string">
            <text:p text:style-name="Text_20_body"><text:span text:style-name="Основной_20_шрифт_20_абзаца"><text:span text:style-name="T14">Тип данных</text:span></text:span></text:p>
          </table:table-cell>
          <table:table-cell table:style-name="Таблица5.A1" office:value-type="string">
            <text:p text:style-name="Text_20_body"><text:span text:style-name="Основной_20_шрифт_20_абзаца"><text:span text:style-name="T14">Описание</text:span></text:span></text:p>
          </table:table-cell>
        </table:table-row>
        <table:table-row>
          <table:table-cell table:style-name="Таблица5.A1" office:value-type="string">
            <text:p text:style-name="Text_20_body">id</text:p>
          </table:table-cell>
          <table:table-cell table:style-name="Таблица5.A1" office:value-type="string">
            <text:p text:style-name="Text_20_body">Integer (PK)</text:p>
          </table:table-cell>
          <table:table-cell table:style-name="Таблица5.A1" office:value-type="string">
            <text:p text:style-name="Text_20_body">Уникальный идентификатор</text:p>
          </table:table-cell>
        </table:table-row>
        <table:table-row>
          <table:table-cell table:style-name="Таблица5.A1" office:value-type="string">
            <text:p text:style-name="Text_20_body">user_id</text:p>
          </table:table-cell>
          <table:table-cell table:style-name="Таблица5.A1" office:value-type="string">
            <text:p text:style-name="Text_20_body">FK → User</text:p>
          </table:table-cell>
          <table:table-cell table:style-name="Таблица5.A1" office:value-type="string">
            <text:p text:style-name="Text_20_body">Связь с пользователем</text:p>
          </table:table-cell>
        </table:table-row>
        <table:table-row>
          <table:table-cell table:style-name="Таблица5.A1" office:value-type="string">
            <text:p text:style-name="Text_20_body">film_id</text:p>
          </table:table-cell>
          <table:table-cell table:style-name="Таблица5.A1" office:value-type="string">
            <text:p text:style-name="Text_20_body">FK → Film</text:p>
          </table:table-cell>
          <table:table-cell table:style-name="Таблица5.A1" office:value-type="string">
            <text:p text:style-name="Text_20_body">Связь с фильмом</text:p>
          </table:table-cell>
        </table:table-row>
        <table:table-row>
          <table:table-cell table:style-name="Таблица5.A1" office:value-type="string">
            <text:p text:style-name="Text_20_body">rating</text:p>
          </table:table-cell>
          <table:table-cell table:style-name="Таблица5.A1" office:value-type="string">
            <text:p text:style-name="Text_20_body">Float</text:p>
          </table:table-cell>
          <table:table-cell table:style-name="Таблица5.A1" office:value-type="string">
            <text:p text:style-name="Text_20_body">Оценка пользователя</text:p>
          </table:table-cell>
        </table:table-row>
        <table:table-row>
          <table:table-cell table:style-name="Таблица5.A1" office:value-type="string">
            <text:p text:style-name="Text_20_body">timestamp</text:p>
          </table:table-cell>
          <table:table-cell table:style-name="Таблица5.A1" office:value-type="string">
            <text:p text:style-name="Text_20_body">Datetime</text:p>
          </table:table-cell>
          <table:table-cell table:style-name="Таблица5.A1" office:value-type="string">
            <text:p text:style-name="Text_20_body">Время оценки</text:p>
          </table:table-cell>
        </table:table-row>
      </table:table>
      <text:p text:style-name="P66">Связи между таблицами реализованы по принципу «один ко многим». Один пользователь может оставить множество оценок, и один фильм может иметь множество оценок. Такая структура является классической для рекомендательных систем и обеспечивает гибкость при анализе данных.</text:p>
      <text:p text:style-name="P66"><text:soft-page-break/>Дополнительно реализовано ограничение уникальности, запрещающее одному пользователю оценивать один и тот же фильм более одного раза. Это повышает корректность данных и предотвращает искажение результатов рекомендаций.</text:p>
      <text:p text:style-name="P66">Для повышения производительности базы данных используются индексы, особенно по внешним ключам и временным меткам. Это позволяет ускорить выполнение запросов при работе с большими объёмами данных.</text:p>
      <text:h text:style-name="P60" text:outline-level="2"><text:bookmark-start text:name="__RefHeading___Toc3815_2666258103"/>2.3<text:tab/>Принцип работы системы рекомендаций<text:bookmark-end text:name="__RefHeading___Toc3815_2666258103"/></text:h>
      <text:p text:style-name="P66"/>
      <text:p text:style-name="P66">Ключевым элементом разработанного веб-сервиса является алгоритм рекомендаций. В отличие от простых систем, основанных исключительно на сходстве, в данном проекте реализован подход, учитывающий фактор новизны, что позволяет повысить разнообразие предлагаемого контента.</text:p>
      <text:p text:style-name="P66">Основной проблемой традиционных рекомендательных систем является эффект так называемого «информационного пузыря», при котором пользователь получает только те рекомендации, которые полностью совпадают с его предыдущими предпочтениями. Это приводит к снижению интереса и ограничению пользовательского опыта.</text:p>
      <text:p text:style-name="P66">Для решения данной проблемы был реализован гибридный алгоритм, объединяющий два компонента: точность (accuracy) и новизну (serendipity).</text:p>
      <text:p text:style-name="P66">Параметр α играет ключевую роль, определяя баланс между предсказуемостью и неожиданностью рекомендаций. При малых значениях α система стремится рекомендовать фильмы, максимально похожие на уже просмотренные. При увеличении значения α возрастает доля новых и менее очевидных рекомендаций.</text:p>
      <text:p text:style-name="P66">Процесс формирования рекомендаций включает несколько этапов. На первом этапе формируется профиль пользователя на основе его оценок. Далее вычисляется сходство между фильмами с использованием жанровых характеристик и пользовательских оценок. После этого рассчитывается фактор новизны, который может зависеть от популярности фильма или степени его отличия от ранее просмотренных.</text:p>
      <text:p text:style-name="P66">Таким образом, итоговая рекомендация представляет собой компромисс между точностью и разнообразием, что делает систему более гибкой и адаптивной.</text:p>
      <text:h text:style-name="P60" text:outline-level="2"><text:bookmark-start text:name="__RefHeading___Toc3817_2666258103"/>2.4<text:tab/>Реализация веб-интерфейса<text:bookmark-end text:name="__RefHeading___Toc3817_2666258103"/></text:h>
      <text:p text:style-name="P66"><text:soft-page-break/>Пользовательский интерфейс является важной частью системы, поскольку именно через него осуществляется взаимодействие пользователя с приложением. При разработке интерфейса особое внимание уделялось удобству использования, простоте навигации и визуальной привлекательности.</text:p>
      <text:p text:style-name="P66">Интерфейс реализован с использованием HTML, CSS и JavaScript. Такой выбор обусловлен необходимостью создания лёгкого и быстрого приложения без избыточных зависимостей.</text:p>
      <text:p text:style-name="P66">Одной из ключевых особенностей интерфейса является адаптивность, позволяющая корректно отображать страницы на различных устройствах. Это достигается за счёт использования современных технологий вёрстки, таких как Flexbox и CSS Grid.</text:p>
      <text:p text:style-name="P66"/>
      <text:p text:style-name="P51">Таблица 2.6 — Основные элементы интерфейса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Text_20_body"><text:span text:style-name="Основной_20_шрифт_20_абзаца"><text:span text:style-name="T14">Элемент</text:span></text:span></text:p>
          </table:table-cell>
          <table:table-cell table:style-name="Таблица6.A1" office:value-type="string">
            <text:p text:style-name="Text_20_body"><text:span text:style-name="Основной_20_шрифт_20_абзаца"><text:span text:style-name="T14">Назначение</text:span></text:span></text:p>
          </table:table-cell>
        </table:table-row>
        <table:table-row>
          <table:table-cell table:style-name="Таблица6.A1" office:value-type="string">
            <text:p text:style-name="Text_20_body">Карточка фильма</text:p>
          </table:table-cell>
          <table:table-cell table:style-name="Таблица6.A1" office:value-type="string">
            <text:p text:style-name="Text_20_body">Отображение информации</text:p>
          </table:table-cell>
        </table:table-row>
        <table:table-row>
          <table:table-cell table:style-name="Таблица6.A1" office:value-type="string">
            <text:p text:style-name="Text_20_body">Ползунок α</text:p>
          </table:table-cell>
          <table:table-cell table:style-name="Таблица6.A1" office:value-type="string">
            <text:p text:style-name="Text_20_body">Управление рекомендациями</text:p>
          </table:table-cell>
        </table:table-row>
        <table:table-row>
          <table:table-cell table:style-name="Таблица6.A1" office:value-type="string">
            <text:p text:style-name="Text_20_body">Кнопки оценки</text:p>
          </table:table-cell>
          <table:table-cell table:style-name="Таблица6.A1" office:value-type="string">
            <text:p text:style-name="Text_20_body">Ввод данных</text:p>
          </table:table-cell>
        </table:table-row>
        <table:table-row>
          <table:table-cell table:style-name="Таблица6.A1" office:value-type="string">
            <text:p text:style-name="Text_20_body">Тёмная тема</text:p>
          </table:table-cell>
          <table:table-cell table:style-name="Таблица6.A1" office:value-type="string">
            <text:p text:style-name="Text_20_body">Повышение удобства</text:p>
          </table:table-cell>
        </table:table-row>
      </table:table>
      <text:p text:style-name="P51"/>
      <text:p text:style-name="P66">Основным элементом интерфейса является карточка фильма, которая содержит информацию о названии, жанрах, описании и изображении. Пользователь может взаимодействовать с карточками, выставляя оценки, что напрямую влияет на работу алгоритма рекомендаций.</text:p>
      <text:p text:style-name="P66">Дополнительно реализованы механизмы оптимизации, такие как ленивые загрузки изображений и кэширование данных, что позволяет снизить нагрузку на систему и ускорить работу приложения.</text:p>
      <text:p text:style-name="P66"/>
      <text:p text:style-name="P66"/>
      <text:h text:style-name="P60" text:outline-level="2"><text:bookmark-start text:name="__RefHeading___Toc3819_2666258103"/>2.5<text:tab/>Интеграция с внешними API для обогащения метаданных<text:bookmark-end text:name="__RefHeading___Toc3819_2666258103"/></text:h>
      <text:p text:style-name="Text_20_body"/>
      <text:p text:style-name="P66">Для обеспечения системы актуальными данными была реализована интеграция с внешними API. Основным источником информации является TMDB API, предоставляющий данные о фильмах.</text:p>
      <text:p text:style-name="P66"><text:soft-page-break/>Процесс интеграции включает отправку HTTP-запросов, получение ответов в формате JSON и их последующую обработку. Полученные данные сохраняются в базе данных и используются при формировании рекомендаций.</text:p>
      <text:p text:style-name="P51"/>
      <text:p text:style-name="P51">Таблица 2.7 — Результаты интеграции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Text_20_body"><text:span text:style-name="Основной_20_шрифт_20_абзаца"><text:span text:style-name="T14">Показатель</text:span></text:span></text:p>
          </table:table-cell>
          <table:table-cell table:style-name="Таблица7.A1" office:value-type="string">
            <text:p text:style-name="Text_20_body"><text:span text:style-name="Основной_20_шрифт_20_абзаца"><text:span text:style-name="T14">Значение</text:span></text:span></text:p>
          </table:table-cell>
        </table:table-row>
        <table:table-row>
          <table:table-cell table:style-name="Таблица7.A1" office:value-type="string">
            <text:p text:style-name="Text_20_body">Общее количество фильмов</text:p>
          </table:table-cell>
          <table:table-cell table:style-name="Таблица7.A1" office:value-type="string">
            <text:p text:style-name="Text_20_body">10 000</text:p>
          </table:table-cell>
        </table:table-row>
        <table:table-row>
          <table:table-cell table:style-name="Таблица7.A1" office:value-type="string">
            <text:p text:style-name="Text_20_body">Фильмы с постерами</text:p>
          </table:table-cell>
          <table:table-cell table:style-name="Таблица7.A1" office:value-type="string">
            <text:p text:style-name="Text_20_body">96%</text:p>
          </table:table-cell>
        </table:table-row>
        <table:table-row>
          <table:table-cell table:style-name="Таблица7.A1" office:value-type="string">
            <text:p text:style-name="Text_20_body">Среднее время ответа</text:p>
          </table:table-cell>
          <table:table-cell table:style-name="Таблица7.A1" office:value-type="string">
            <text:p text:style-name="Text_20_body">200 мс</text:p>
          </table:table-cell>
        </table:table-row>
      </table:table>
      <text:p text:style-name="P51"/>
      <text:p text:style-name="P51">Использование внешних API позволяет существенно повысить качество системы без необходимости ручного заполнения базы данных.</text:p>
      <text:h text:style-name="P60" text:outline-level="2"><text:bookmark-start text:name="__RefHeading___Toc3821_2666258103"/>2.6<text:tab/>Функциональное тестирование системы<text:bookmark-end text:name="__RefHeading___Toc3821_2666258103"/></text:h>
      <text:p text:style-name="Text_20_body"/>
      <text:p text:style-name="P66">Тестирование системы проводилось с целью проверки её корректности, стабильности и эффективности. Были проведены функциональные и нагрузочные тесты.</text:p>
      <text:p text:style-name="P66">Функциональное тестирование подтвердило корректность работы всех основных функций системы. Нагрузочное тестирование показало, что система способна обрабатывать запросы с минимальными задержками.</text:p>
      <text:p text:style-name="P51"/>
      <text:p text:style-name="P51">Таблица 2.8 — Метрики качества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Text_20_body"><text:span text:style-name="Основной_20_шрифт_20_абзаца"><text:span text:style-name="T14">Метрика</text:span></text:span></text:p>
          </table:table-cell>
          <table:table-cell table:style-name="Таблица8.A1" office:value-type="string">
            <text:p text:style-name="Text_20_body"><text:span text:style-name="Основной_20_шрифт_20_абзаца"><text:span text:style-name="T14">Значение</text:span></text:span></text:p>
          </table:table-cell>
        </table:table-row>
        <table:table-row>
          <table:table-cell table:style-name="Таблица8.A1" office:value-type="string">
            <text:p text:style-name="Text_20_body">Precision@10</text:p>
          </table:table-cell>
          <table:table-cell table:style-name="Таблица8.A1" office:value-type="string">
            <text:p text:style-name="Text_20_body">0.78</text:p>
          </table:table-cell>
        </table:table-row>
        <table:table-row>
          <table:table-cell table:style-name="Таблица8.A1" office:value-type="string">
            <text:p text:style-name="Text_20_body">Recall</text:p>
          </table:table-cell>
          <table:table-cell table:style-name="Таблица8.A1" office:value-type="string">
            <text:p text:style-name="Text_20_body">0.65</text:p>
          </table:table-cell>
        </table:table-row>
        <table:table-row>
          <table:table-cell table:style-name="Таблица8.A1" office:value-type="string">
            <text:p text:style-name="Text_20_body">NDCG</text:p>
          </table:table-cell>
          <table:table-cell table:style-name="Таблица8.A1" office:value-type="string">
            <text:p text:style-name="Text_20_body">0.81</text:p>
          </table:table-cell>
        </table:table-row>
      </table:table>
      <text:p text:style-name="P51"/>
      <text:p text:style-name="P51">Полученные результаты демонстрируют высокую эффективность разработанного алгоритма рекомендаций.</text:p>
      <text:p text:style-name="P51"/>
      <text:h text:style-name="P60" text:outline-level="2"><text:bookmark-start text:name="__RefHeading___Toc3823_2666258103"/>2.7<text:tab/>Инструкция по развёртыванию и эксплуатации<text:bookmark-end text:name="__RefHeading___Toc3823_2666258103"/></text:h>
      <text:p text:style-name="Text_20_body"/>
      <text:p text:style-name="P66"><text:soft-page-break/>Развёртывание веб-сервиса «Serendipity Cinema» включает несколько последовательных этапов: подготовку окружения, установку зависимостей, настройку базы данных и запуск сервера. Процесс разработан с учётом минимизации ручной настройки и обеспечения воспроизводимости. </text:p>
      <text:p text:style-name="P66">На этапе разработки используется встроенный сервер Django, однако для промышленной эксплуатации применяется связка Gunicorn и Nginx, обеспечивающая более высокую производительность и надёжность.</text:p>
      <text:p text:style-name="P66">После запуска система становится доступной пользователям через веб-браузер, а её дальнейшее сопровождение включает обновление данных, мониторинг и резервное копирование.</text:p>
      <text:p text:style-name="P51"/>
      <text:p text:style-name="P69">Этапы развёртывания:</text:p>
      <text:list text:style-name="L12">
        <text:list-item>
          <text:p text:style-name="P70">Подготовка окружения — установка Python версии 3.11 или выше, системы управления версиями Git, создание рабочей директории проекта.</text:p>
        </text:list-item>
        <text:list-item>
          <text:p text:style-name="P70">Установка проекта — клонирование репозитория или копирование файлов проекта, создание виртуального окружения Python для изоляции зависимостей, установка необходимых библиотек через пакетный менеджер pip согласно файлу requirements.txt.</text:p>
        </text:list-item>
        <text:list-item>
          <text:p text:style-name="P70">Настройка базы данных — выполнение миграций Django для создания структуры базы данных, создание учётной записи суперпользователя (администратора) с правами полного доступа, опциональная загрузка начального набора данных из датасета MovieLens, загрузка постеров фильмов через интеграцию с TMDB API.</text:p>
        </text:list-item>
        <text:list-item>
          <text:p text:style-name="P70">Запуск сервера — для режима разработки используется встроенный сервер Django с командой manage.py runserver, для промышленной эксплуатации рекомендуется применение производственного WSGI-сервера Gunicorn с несколькими воркерами и веб-сервера Nginx в качестве обратного прокси.</text:p>
        </text:list-item>
      </text:list>
      <text:p text:style-name="P51"/>
      <text:p text:style-name="P51"/>
      <text:p text:style-name="P69">Результаты развёртывания:</text:p>
      <text:p text:style-name="P66">После успешного выполнения всех этапов система становится доступной по адресу http://127.0.0.1:8000/ для локального тестирования или по доменному имени при развёртывании на производственном сервере. Панель администратора Django доступна по адресу http://127.0.0.1:8000/admin/ и предоставляет интерфейс для управления пользователями, фильмами и оценками.</text:p>
      <text:p text:style-name="P69"><text:soft-page-break/>Регулярное обслуживание:</text:p>
      <text:p text:style-name="P66">Для поддержания системы в работоспособном состоянии рекомендуется регулярно выполнять резервное копирование базы данных, периодически обновлять постеры и метаданные фильмов через API, отслеживать логи приложения для выявления и устранения ошибок, своевременно обновлять зависимости проекта для обеспечения безопасности и совместимости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bookmark text:name="__RefHeading___Toc746_1761186612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 text:c="65"/></text:p>
      <text:p text:style-name="P71"/>
      <text:h text:style-name="P24" text:outline-level="1"><text:bookmark-start text:name="__RefHeading___Toc3827_2666258103"/><text:soft-page-break/>ПРИЛОЖЕНИЕ <text:span text:style-name="T15">A</text:span>. Скриншоты интерфейса системы<text:bookmark-end text:name="__RefHeading___Toc3827_2666258103"/></text:h>
      <text:p text:style-name="Text_20_body"/>
      <text:p text:style-name="Text_20_body"><draw:frame draw:style-name="fr1" draw:name="Рисунок 2" text:anchor-type="as-char" svg:y="0cm" svg:width="17.551cm" style:rel-width="scale" svg:height="9.382cm" style:rel-height="scale" draw:z-index="0"><draw:image xlink:href="Pictures/1000000100000944000004F4CA8DA7E9.png" xlink:type="simple" xlink:show="embed" xlink:actuate="onLoad" draw:mime-type="image/png"/></draw:frame></text:p>
      <text:p text:style-name="Text_20_body"><draw:frame draw:style-name="fr1" draw:name="Рисунок 4" text:anchor-type="as-char" svg:y="0cm" svg:width="17.551cm" style:rel-width="scale" svg:height="9.359cm" style:rel-height="scale" draw:z-index="1"><draw:image xlink:href="Pictures/1000000100000944000004F1C4F99C39.png" xlink:type="simple" xlink:show="embed" xlink:actuate="onLoad" draw:mime-type="image/png"/></draw:frame></text:p>
      <text:p text:style-name="Text_20_body"><text:soft-page-break/><draw:frame draw:style-name="fr1" draw:name="Рисунок 1" text:anchor-type="as-char" svg:y="0cm" svg:width="17.551cm" style:rel-width="scale" svg:height="9.287cm" style:rel-height="scale" draw:z-index="2"><draw:image xlink:href="Pictures/1000000100000951000004EE982E3E2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829_2666258103"/><text:soft-page-break/>СПИСОК ИНФОРМАЦИОННЫХ ИСТОЧНИКОВ<text:bookmark-end text:name="__RefHeading___Toc3829_2666258103"/></text:h>
      <text:list text:style-name="Numbering_20_123">
        <text:list-item text:start-value="1">
          <text:p text:style-name="P73"><text:span text:style-name="Основной_20_шрифт_20_абзаца"><text:span text:style-name="T16">Конституция Российской Федерации. – Принята всенародным голосованием 12.12.1993 (с учетом поправок). – Ст. 23, 24, 44.</text:span></text:span></text:p>
        </text:list-item>
        <text:list-item>
          <text:p text:style-name="P73"><text:span text:style-name="Основной_20_шрифт_20_абзаца"><text:span text:style-name="T16">Гражданский кодекс Российской Федерации (часть четвертая): Федеральный закон от 18.12.2006 № 230-ФЗ (ред. от 14.07.2022). – Гл. 70, 72. Федеральный закон от 27.07.2006 № 149-ФЗ «Об информации, информационных технологиях и о защите информации» // Собрание законодательства РФ. – 2006. – № 31 (ч. 1). – Ст. 3448. <text:line-break/>Федеральный закон от 27.07.2006 № 152-ФЗ «О персональных данных» // Собрание законодательства РФ. – 2006. – № 31 (ч. 1). – Ст. 3451. <text:line-break/>Федеральный закон от 26.07.2017 № 187-ФЗ «О безопасности критической информационной инфраструктуры Российской Федерации» // Собрание законодательства РФ. – 2017. – № 31. – Ст. 4825. <text:line-break/>Федеральный</text:span></text:span></text:p>
        </text:list-item>
        <text:list-item>
          <text:p text:style-name="P73"><text:span text:style-name="Основной_20_шрифт_20_абзаца"><text:span text:style-name="T16">закон от 27.12.2002 № 184-ФЗ «О техническом регулировании» // Собрание законодательства РФ. – 2002. – № 52 (ч. 1). – Ст. 5140.</text:span></text:span></text:p>
        </text:list-item>
        <text:list-item>
          <text:p text:style-name="P73"><text:span text:style-name="Основной_20_шрифт_20_абзаца"><text:span text:style-name="T16">ГОСТ Р 56939-2016. Информационные технологии. Программное обеспечение. Общие требования к процессам жизненного цикла программных средств. – Введ. 2017-07-01. – М.: Стандартинформ, 2017. – 27 с.</text:span></text:span></text:p>
        </text:list-item>
        <text:list-item>
          <text:p text:style-name="P73"><text:span text:style-name="Основной_20_шрифт_20_абзаца"><text:span text:style-name="T16">ГОСТ Р 57580.1-2017. Безопасность финансовых (банковских) операций. Защита информации финансовых организаций. Общие положения. – Введ. 2018-01-01. – М.: Стандартинформ, 2018. – 24 с.</text:span></text:span></text:p>
        </text:list-item>
        <text:list-item>
          <text:p text:style-name="P73"><text:span text:style-name="Основной_20_шрифт_20_абзаца"><text:span text:style-name="T16">Методические рекомендации ФСТЭК России по обеспечению безопасности персональных данных при их обработке в информационных системах персональных данных. – Утв. ФСТЭК России 18.02.2013 № 21. ГОСТ Р 7.0.100–2018.</text:span></text:span></text:p>
        </text:list-item>
        <text:list-item>
          <text:p text:style-name="P73"><text:span text:style-name="Основной_20_шрифт_20_абзаца"><text:span text:style-name="T16">Система стандартов по информации, библиотечному и издательскому делу. Библиографическая запись. Библиографическое описание. Общие требования и правила составления. – Введ. 2019-01-01. – М.: Стандартинформ, 2019. – 77 с.</text:span></text:span></text:p>
        </text:list-item>
        <text:list-item>
          <text:p text:style-name="P73"><text:span text:style-name="Основной_20_шрифт_20_абзаца"><text:span text:style-name="T16">ГОСТ 19.701-90 (ИСО 5807-85). Единая система программной документации. Схемы алгоритмов, программ, данных и систем. Условные обозначения и правила выполнения. – Введ. 1991-01-01. – М.: Издательство стандартов, 1991. – 48 с.</text:span></text:span></text:p>
        </text:list-item>
        <text:list-item>
          <text:p text:style-name="P73"><text:span text:style-name="Основной_20_шрифт_20_абзаца"><text:span text:style-name="T16">ГОСТ Р 7.0.108—2022. Система стандартов по информации, библиотечному и издательскому делу. Электронные издания. Основные виды и выходные сведения. – Введ. 2023-01-01. – М.: Стандартинформ, 2023. – 33 с.</text:span></text:span></text:p>
        </text:list-item>
        <text:list-item>
          <text:p text:style-name="P73"><text:span text:style-name="Основной_20_шрифт_20_абзаца"><text:span text:style-name="T16">ГОСТ Р 2.105—2019. Единая система конструкторской документации. Общие требования к текстовым документам. – Введ. 2020-09-01. – М.: Стандартинформ, 2020. – 20 с.</text:span>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.01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>
        <style:tab-stops>
          <style:tab-stop style:position="16.514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 fo:hyphenation-keep="auto" loext:hyphenation-keep-type="column">
        <style:tab-stops>
          <style:tab-stop style:position="16.01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hyphenation-ladder-count="no-limit" fo:hyphenation-keep="auto" loext:hyphenation-keep-type="column">
        <style:tab-stops>
          <style:tab-stop style:position="16.05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katex-mathml" style:family="text" style:parent-style-name="Основной_20_шрифт_20_абзаца"/>
    <style:style style:name="mord" style:family="text" style:parent-style-name="Основной_20_шрифт_20_абзаца"/>
    <style:style style:name="mrel" style:family="text" style:parent-style-name="Основной_20_шрифт_20_абзаца"/>
    <style:style style:name="mopen" style:family="text" style:parent-style-name="Основной_20_шрифт_20_абзаца"/>
    <style:style style:name="mbin" style:family="text" style:parent-style-name="Основной_20_шрифт_20_абзаца"/>
    <style:style style:name="mclose" style:family="text" style:parent-style-name="Основной_20_шрифт_20_абзаца"/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78cm" fo:margin-right="1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6-02-26T10:24:00Z</meta:creation-date>
    <dc:date>2026-04-23T01:26:23.295000000</dc:date>
    <meta:editing-cycles>20</meta:editing-cycles>
    <meta:editing-duration>PT3H17M36S</meta:editing-duration>
    <meta:document-statistic meta:table-count="8" meta:image-count="3" meta:object-count="0" meta:page-count="24" meta:paragraph-count="390" meta:word-count="4491" meta:character-count="38243" meta:non-whitespace-character-count="33073"/>
    <meta:template xlink:type="simple" xlink:actuate="onRequest" xlink:title="" xlink:href="Normal.dotm"/>
  </office:meta>
</office:document-meta>
</file>